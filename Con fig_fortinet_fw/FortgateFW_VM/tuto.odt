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16pt" officeooo:rsid="00149d4c" officeooo:paragraph-rsid="00149d4c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6pt" officeooo:rsid="00149d4c" officeooo:paragraph-rsid="00149d4c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ler et config un environnemnt de test.</text:p>
      <text:p text:style-name="P2">1. telecharger et installer la VM de test Fortigate sur Forticloud.</text:p>
      <text:p text:style-name="P2">2. le port wan (Network adaptater) reste en NAT et DHCP</text:p>
      <text:p text:style-name="P2">3. le port LAN (Network adaptater 2) reste dans le meme reseau que les autres <text:s/>VM</text:p>
      <text:p text:style-name="P2">4. config les interface et le Fw policy pour le communication vers le wan.</text:p>
      <text:p text:style-name="P2">5. config la static route. La gateway est 172.16.179.2 (vmnet8). elle correspond a celle donner par l’hyperviseur. Il ne s’agit pas de la gateway du routeur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9T09:57:10.516707527</meta:creation-date>
    <dc:date>2026-05-19T18:00:50.735930471</dc:date>
    <meta:editing-duration>PT7H53M29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6" meta:word-count="85" meta:character-count="478" meta:non-whitespace-character-count="398"/>
  </office:meta>
</office:document-meta>
</file>