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213f" officeooo:paragraph-rsid="001b213f"/>
    </style:style>
    <style:style style:name="P2" style:family="paragraph" style:parent-style-name="Standard">
      <style:text-properties officeooo:rsid="001b213f" officeooo:paragraph-rsid="001b30b2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15pt" fo:font-weight="bold" officeooo:rsid="001b30b2" officeooo:paragraph-rsid="001b30b2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text-properties fo:font-size="14pt" officeooo:rsid="001b30b2" officeooo:paragraph-rsid="001b30b2" style:font-size-asian="12.25pt" style:font-size-complex="14pt"/>
    </style:style>
    <style:style style:name="P5" style:family="paragraph" style:parent-style-name="Standard" style:list-style-name="L2">
      <style:text-properties fo:font-size="14pt" officeooo:rsid="001b30b2" officeooo:paragraph-rsid="001bb717" style:font-size-asian="12.25pt" style:font-size-complex="14pt"/>
    </style:style>
    <style:style style:name="P6" style:family="paragraph" style:parent-style-name="Standard" style:list-style-name="L1">
      <style:text-properties fo:font-size="14pt" officeooo:rsid="001ec230" officeooo:paragraph-rsid="001ec230" style:font-size-asian="12.25pt" style:font-size-complex="14pt"/>
    </style:style>
    <style:style style:name="P7" style:family="paragraph" style:parent-style-name="Standard" style:list-style-name="L3">
      <style:text-properties fo:font-size="14pt" officeooo:rsid="001ec230" officeooo:paragraph-rsid="001ec230" style:font-size-asian="12.25pt" style:font-size-complex="14pt"/>
    </style:style>
    <style:style style:name="P8" style:family="paragraph" style:parent-style-name="Standard" style:list-style-name="L3">
      <style:text-properties fo:font-size="14pt" officeooo:rsid="0020dbd7" officeooo:paragraph-rsid="0020dbd7" style:font-size-asian="12.25pt" style:font-size-complex="14pt"/>
    </style:style>
    <style:style style:name="P9" style:family="paragraph" style:parent-style-name="Standard" style:list-style-name="L1">
      <style:text-properties officeooo:rsid="001bb717" officeooo:paragraph-rsid="001bb717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officeooo:rsid="001ec230"/>
    </style:style>
    <style:style style:name="T3" style:family="text">
      <style:text-properties officeooo:rsid="0021b50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Etapes de configuration</text:p>
      <text:p text:style-name="P1"/>
      <text:list xml:id="list1689163891" text:style-name="L1">
        <text:list-item>
          <text:p text:style-name="P4"><text:s/>Creer la route static</text:p>
        </text:list-item>
        <text:list-item>
          <text:p text:style-name="P4">Creer une adresse (un objet pour la politique du FW)</text:p>
        </text:list-item>
        <text:list-item>
          <text:p text:style-name="P4">Creer la politique de control.</text:p>
        </text:list-item>
      </text:list>
      <text:list text:style-name="L2">
        <text:list-item>
          <text:list>
            <text:list-item>
              <text:p text:style-name="P5">Dans la politique LAN to WAN, l’adresse source est celle qu’on aura créer et associer au reseau LAN.</text:p>
            </text:list-item>
          </text:list>
        </text:list-item>
      </text:list>
      <text:list text:continue-list="list1689163891" text:style-name="L1">
        <text:list-item>
          <text:p text:style-name="P9">Creer le SNAT (avec le NAT central) → system → settings → central NAT : <text:span text:style-name="T2">le SNAT permet de transformer la source (a la sortir , il devient une ip public)</text:span></text:p>
        </text:list-item>
        <text:list-item>
          <text:p text:style-name="P6">Creer le DNAT <text:span text:style-name="T3">(ce créer sur le FW sur lequel est directement lieer le server.)</text:span></text:p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7">le DNAT permet d’associer l’ip du port du FW (le wan) a l’ip du server web (wodpress). ainsi la destination est changer grace au DNAT.</text:p>
                      <text:list>
                        <text:list-item>
                          <text:p text:style-name="P8">Créer un virtual Ips (policy&amp;object → virtual IPs)</text:p>
                        </text:list-item>
                        <text:list-item>
                          <text:p text:style-name="P8">créer une nouvelle politique ou la destination est le virtual Ips créer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1"/></text:p>
      <text:p text:style-name="P1"><text:tab/><text:tab/></text:p>
      <text:p text:style-name="P1">SNAT → source NAT</text:p>
      <text:p text:style-name="P1">DNAT → destination N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1:28:49.944411037</meta:creation-date>
    <meta:generator>LibreOffice/24.2.7.2$Linux_X86_64 LibreOffice_project/420$Build-2</meta:generator>
    <dc:date>2026-04-27T12:37:49.818335850</dc:date>
    <meta:editing-duration>PT6H30M27S</meta:editing-duration>
    <meta:editing-cycles>4</meta:editing-cycles>
    <meta:document-statistic meta:table-count="0" meta:image-count="0" meta:object-count="0" meta:page-count="1" meta:paragraph-count="13" meta:word-count="148" meta:character-count="768" meta:non-whitespace-character-count="638"/>
  </office:meta>
</office:document-meta>
</file>