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font-size="14pt" style:font-size-asian="14pt" style:font-size-complex="14pt"/>
    </style:style>
    <style:style style:name="P2" style:family="paragraph" style:parent-style-name="Text_20_body">
      <style:paragraph-properties fo:line-height="150%"/>
    </style:style>
    <style:style style:name="P3" style:family="paragraph" style:parent-style-name="Text_20_body">
      <style:paragraph-properties fo:line-height="150%" fo:orphans="1"/>
    </style:style>
    <style:style style:name="P4" style:family="paragraph" style:parent-style-name="Text_20_body">
      <style:paragraph-properties fo:line-height="150%"/>
      <style:text-properties fo:font-size="14pt" style:font-size-asian="14pt" style:font-size-complex="14pt"/>
    </style:style>
    <style:style style:name="P5" style:family="paragraph" style:parent-style-name="Text_20_body">
      <style:paragraph-properties fo:line-height="150%" fo:orphans="1"/>
      <style:text-properties fo:font-size="14pt" officeooo:paragraph-rsid="001c0d07" style:font-size-asian="14pt" style:font-size-complex="14pt"/>
    </style:style>
    <style:style style:name="P6" style:family="paragraph" style:parent-style-name="Text_20_body">
      <style:paragraph-properties fo:line-height="150%" fo:orphans="1"/>
      <style:text-properties fo:font-size="14pt" style:font-size-asian="14pt" style:font-size-complex="14pt"/>
    </style:style>
    <style:style style:name="P7" style:family="paragraph" style:parent-style-name="Text_20_body" style:list-style-name="L25">
      <style:paragraph-properties fo:line-height="150%" fo:orphans="1"/>
      <style:text-properties fo:font-size="14pt" style:font-size-asian="14pt" style:font-size-complex="14pt"/>
    </style:style>
    <style:style style:name="P8" style:family="paragraph" style:parent-style-name="Text_20_body" style:list-style-name="L25">
      <style:paragraph-properties fo:margin-top="0cm" fo:margin-bottom="0cm" style:contextual-spacing="false" fo:line-height="150%"/>
      <style:text-properties fo:font-size="14pt" style:font-size-asian="14pt" style:font-size-complex="14pt"/>
    </style:style>
    <style:style style:name="P9" style:family="paragraph" style:parent-style-name="Text_20_body" style:list-style-name="L25">
      <style:paragraph-properties fo:line-height="150%"/>
      <style:text-properties fo:font-size="14pt" style:font-size-asian="14pt" style:font-size-complex="14pt"/>
    </style:style>
    <style:style style:name="P10" style:family="paragraph" style:parent-style-name="Text_20_body" style:list-style-name="L37">
      <style:paragraph-properties fo:margin-top="0cm" fo:margin-bottom="0cm" style:contextual-spacing="false" fo:line-height="150%"/>
      <style:text-properties fo:font-size="14pt" style:font-size-asian="14pt" style:font-size-complex="14pt"/>
    </style:style>
    <style:style style:name="P11" style:family="paragraph" style:parent-style-name="Text_20_body" style:list-style-name="L37">
      <style:paragraph-properties fo:line-height="150%"/>
      <style:text-properties fo:font-size="14pt" style:font-size-asian="14pt" style:font-size-complex="14pt"/>
    </style:style>
    <style:style style:name="P12" style:family="paragraph" style:parent-style-name="Text_20_body" style:list-style-name="L37">
      <style:paragraph-properties fo:line-height="150%"/>
      <style:text-properties fo:font-size="14pt" officeooo:rsid="001e4e64" officeooo:paragraph-rsid="001e4e64" style:font-size-asian="14pt" style:font-size-complex="14pt"/>
    </style:style>
    <style:style style:name="P13" style:family="paragraph" style:parent-style-name="Text_20_body" style:list-style-name="L25">
      <style:paragraph-properties fo:line-height="150%"/>
      <style:text-properties fo:font-size="14pt" officeooo:rsid="001e4e64" officeooo:paragraph-rsid="001e4e64" style:font-size-asian="14pt" style:font-size-complex="14pt"/>
    </style:style>
    <style:style style:name="T1" style:family="text">
      <style:text-properties fo:font-size="14pt"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3"><text:span text:style-name="Strong_20_Emphasis"><text:span text:style-name="T1">Enterprise Networking Project #7</text:span></text:span></text:p>
      <text:p text:style-name="P5">Melbourne Health Services is a well-established health provider in Australia, which offers health solutions and services to its clients. The institution operates in two locations within the same city, having the hospital headquarters 20km away from the branch hospital. Therefore, it has the following departments within its main headquarters Medical Lead Operation &amp; Consultancy Services (MLOCS), Medical Emergency and Reporting (MER), Medical Records Management (MRM), Information Technology (IT), and Customer Service (CS). The branch hospital was designed to share the workloads with the headquarters hence it contains the following departments; Nurses &amp; Surgery Operations (NSO), Hospital Labs (HL), Human resource (HR), Marketing (MK), and Finance (FIN). Each location is also expected to have a Guest/Waiting area (GWA) for patients or visitors.</text:p>
      <text:p text:style-name="P6">So far the network was using third-party services to maintain its IT services. The senior management has decided to own their network infrastructure including Local Area Network (LAN), Wide Area Network (WAN), and a Server-Side site that is expected to be located separately at the headquarters and is connected to the HQ Router with an access switch. The server-side site will host the DHCP server, DNS Server, Web Server, and Email Server.</text:p>
      <text:p text:style-name="P6">The network is expected to be cost-effective and observes the information security rule of the CIA (Confidentiality, Integrity, and Availability). The network is expected to have a hierarchical model with two already purchased Core routers (one at HQ and one Branch) each connecting to two subscribed ISPs. Due to security requirements, it has been decided that all the departments will be on a separate network segment within the same local area network.</text:p>
      <text:p text:style-name="P4">You have been hired as a network security engineer to design the network according to the requirements set by the senior management. You will consult an appropriate robust network design model to meet the design requirements. You will also implement Access Control Lists and Virtual Private Network (VPN) to enable secure <text:soft-page-break/>communication considering security and network performance factors paramount to safeguarding Confidentiality, Integrity, and Availability of data and communication. The network security policy will comprehensively dictate the user's access to each site using Access Control List (ACL).</text:p>
      <text:p text:style-name="P6"><text:span text:style-name="Strong_20_Emphasis">Network Design and Implementation Requirements</text:span></text:p>
      <text:list text:style-name="L25">
        <text:list-item>
          <text:p text:style-name="P8">Use Cisco Packet Tracer to design and implement the network solution. </text:p>
        </text:list-item>
        <text:list-item>
          <text:p text:style-name="P8">Use a hierarchical model providing redundancy in the network. </text:p>
        </text:list-item>
        <text:list-item>
          <text:p text:style-name="P8">Both HQ and Branch routers are expected to be connected using a serial connection. </text:p>
        </text:list-item>
        <text:list-item>
          <text:p text:style-name="P8">As mentioned earlier, for network cost-effectiveness, each site is expected to have one core router, two multilayer switches, and several access switches connecting each department. </text:p>
        </text:list-item>
        <text:list-item>
          <text:p text:style-name="P8">Each department is required to have a wireless network for the users. </text:p>
        </text:list-item>
        <text:list-item>
          <text:p text:style-name="P8">Every department in HQ is estimated to have around 60 users while in Branch is estimated to be 30 users. </text:p>
        </text:list-item>
        <text:list-item>
          <text:p text:style-name="P8">Each department should be in a different VLAN and a different subnetwork. </text:p>
        </text:list-item>
        <text:list-item>
          <text:p text:style-name="P8">Provided a base network of 192.168.100.0, and carry out subnetting to allocate the correct number of IP addresses to each department. </text:p>
        </text:list-item>
        <text:list-item>
          <text:p text:style-name="P8">The company network is connected to the static, public IP addresses (Internet Protocol) 195.136.17.0/30, 195.136.17.4/30, 195.136.17.8/30, and 195.136.17.12/30 connected to the two Internet providers. </text:p>
        </text:list-item>
        <text:list-item>
          <text:p text:style-name="P9">Configure basic device settings such as hostnames, console password, enable password, banner messages, and disable IP domain lookup.</text:p>
        </text:list-item>
        <text:list-item>
          <text:p text:style-name="P7">Devices in all the departments are required to communicate with each other with the respective multilayer switch configured for inter-VLAN routing. </text:p>
        </text:list-item>
        <text:list-item>
          <text:p text:style-name="P8">The Multilayer switches are expected to carry out both routing and switching functionalities and thus will be assigned IP addresses. </text:p>
        </text:list-item>
        <text:list-item>
          <text:p text:style-name="P8">All devices in the network are expected to obtain an IP address dynamically from the dedicated DHCP servers located in the server room. </text:p>
        </text:list-item>
        <text:list-item>
          <text:p text:style-name="P8"><text:soft-page-break/>Devices in the server room are to be allocated IP addresses statically. </text:p>
        </text:list-item>
        <text:list-item>
          <text:p text:style-name="P8">Use OSPF as the routing protocol to advertise routes both on the routers and multilayer switches. </text:p>
        </text:list-item>
        <text:list-item>
          <text:p text:style-name="P8">Configure default static routing to enable routers and multilayer switches to forward any traffic that does not match routing table entries. Use next-hop IP addresses. </text:p>
        </text:list-item>
        <text:list-item>
          <text:p text:style-name="P8">Configure SSH in all the routers and layer three switches for remote login. </text:p>
        </text:list-item>
        <text:list-item>
          <text:p text:style-name="P8">Configure port-security for the server site department switch to allow only one device to connect to a switch port, use sticky method to obtain mac-address and violation mode shutdown. </text:p>
        </text:list-item>
        <text:list-item>
          <text:p text:style-name="P8">Configure the extended ACL rule together with site-to-site VPN (IPSec VPN) to create a tunnel and encrypt communication between HQ and the Branch network. </text:p>
        </text:list-item>
        <text:list-item>
          <text:p text:style-name="P9">Configure PAT to use the respective outbound router interface IPv4 address, and implement the necessary ACL rule.</text:p>
        </text:list-item>
        <text:list-item>
          <text:p text:style-name="P13">Test the communication. ensure everything configured is working as expected.</text:p>
        </text:list-item>
      </text:list>
      <text:p text:style-name="Text_20_body"><text:span text:style-name="Strong_20_Emphasis"/></text:p>
      <text:p text:style-name="P2"><text:span text:style-name="Strong_20_Emphasis"><text:span text:style-name="T1">Projet de réseautique d'entreprise #7</text:span></text:span></text:p>
      <text:p text:style-name="P4">Melbourne Health Services est un prestataire de santé bien établi en Australie, qui offre des solutions et services de santé à ses clients. L'institution opère dans deux sites au sein de la même ville, le siège de l'hôpital étant situé à 20 km de l'hôpital annexe (branche). Par conséquent, elle dispose des départements suivants au sein de son siège principal : Medical Lead Operation &amp; Consultancy Services (MLOCS), Medical Emergency and Reporting (MER), Medical Records Management (MRM), Information Technology (IT), et Customer Service (CS). L'hôpital annexe a été conçu pour partager la charge de travail avec le siège, et contient donc les départements suivants : Nurses &amp; Surgery Operations (NSO), Hospital Labs (HL), Human Resource (HR), Marketing (MK), et Finance (FIN). Chaque site doit également <text:soft-page-break/>disposer d'une zone d'accueil/attente (Guest/Waiting Area - GWA) pour les patients ou visiteurs.</text:p>
      <text:p text:style-name="P4">Jusqu'à présent, le réseau utilisait des services tiers pour assurer ses services informatiques. La direction générale a décidé de posséder sa propre infrastructure réseau, comprenant un réseau local (LAN), un réseau étendu (WAN), ainsi qu'un site côté serveur (Server-Side) qui devra être situé séparément au siège et connecté au routeur du siège (HQ Router) via un commutateur d'accès. Le site côté serveur hébergera le serveur DHCP, le serveur DNS, le serveur Web et le serveur de messagerie (Email Server).</text:p>
      <text:p text:style-name="P4">Le réseau doit être rentable et respecter la règle de sécurité de l'information de la CIA (Confidentialité, Intégrité et Disponibilité). Le réseau doit disposer d'un modèle hiérarchique avec deux routeurs Core déjà achetés (un au siège social et un en agence), chacun se connectant à deux FAI (Fournisseurs d'Accès à Internet) abonnés. Pour des raisons de sécurité, il a été décidé que tous les départements seront sur un segment réseau séparé au sein du même réseau local.</text:p>
      <text:p text:style-name="P4">Vous avez été recruté en tant qu'ingénieur en sécurité réseau pour concevoir le réseau conformément aux exigences définies par la direction générale. Vous consulterez un modèle de conception réseau robuste et approprié pour répondre aux exigences de conception. Vous mettrez également en œuvre des Listes de Contrôle d'Accès (ACL) et un Réseau Privé Virtuel (VPN) pour permettre une communication sécurisée, en tenant compte des facteurs de sécurité et de performance réseau essentiels à la protection de la Confidentialité, de l'Intégrité et de la Disponibilité des données et des communications. La politique de sécurité réseau dictera de manière exhaustive l'accès des utilisateurs à chaque site à l'aide d'une Liste de Contrôle d'Accès (ACL).</text:p>
      <text:p text:style-name="P2"><text:span text:style-name="Strong_20_Emphasis"><text:span text:style-name="T1">Exigences de Conception et d'Implémentation du Réseau</text:span></text:span></text:p>
      <text:list text:style-name="L37">
        <text:list-item>
          <text:p text:style-name="P10">Utiliser Cisco Packet Tracer pour concevoir et implémenter la solution réseau. </text:p>
        </text:list-item>
        <text:list-item>
          <text:p text:style-name="P10">Utiliser un modèle hiérarchique offrant de la redondance dans le réseau. </text:p>
        </text:list-item>
        <text:list-item>
          <text:p text:style-name="P10">Les routeurs du siège social (HQ) et de l'agence (Branch) doivent être connectés via une connexion série. </text:p>
        </text:list-item>
        <text:list-item>
          <text:p text:style-name="P10"><text:soft-page-break/>Comme mentionné précédemment, pour la rentabilité du réseau, chaque site doit disposer d'un routeur core, de deux commutateurs multicouches et de plusieurs commutateurs d'accès reliant chaque département. </text:p>
        </text:list-item>
        <text:list-item>
          <text:p text:style-name="P10">Chaque département doit disposer d'un réseau sans fil pour les utilisateurs. </text:p>
        </text:list-item>
        <text:list-item>
          <text:p text:style-name="P10">Chaque département du siège social est estimé à environ 60 utilisateurs, tandis qu'à l'agence, le nombre est estimé à 30 utilisateurs. </text:p>
        </text:list-item>
        <text:list-item>
          <text:p text:style-name="P10">Chaque département doit être dans un VLAN différent et un sous-réseau différent. </text:p>
        </text:list-item>
        <text:list-item>
          <text:p text:style-name="P10">En partant du réseau de base 192.168.100.0, effectuer un découpage en sous-réseaux (subnetting) pour allouer le nombre correct d'adresses IP à chaque département. </text:p>
        </text:list-item>
        <text:list-item>
          <text:p text:style-name="P10">Le réseau de l'entreprise est connecté aux adresses IP publiques statiques 195.136.17.0/30, 195.136.17.4/30, 195.136.17.8/30 et 195.136.17.12/30, reliées aux deux fournisseurs d'accès Internet. </text:p>
        </text:list-item>
        <text:list-item>
          <text:p text:style-name="P11">Configurer les paramètres de base des équipements tels que les noms d'hôtes, le mot de passe console, le mot de passe d'activation, les messages de bannière et désactiver la recherche de domaine IP.</text:p>
        </text:list-item>
        <text:list-item>
          <text:p text:style-name="P10">Les équipements de tous les départements doivent pouvoir communiquer entre eux via le commutateur multicouche respectif configuré pour le routage inter-VLAN. </text:p>
        </text:list-item>
        <text:list-item>
          <text:p text:style-name="P10">Les commutateurs multicouches doivent assurer à la fois les fonctionnalités de routage et de commutation et se verront donc attribuer des adresses IP. </text:p>
        </text:list-item>
        <text:list-item>
          <text:p text:style-name="P10">Tous les équipements du réseau doivent obtenir une adresse IP dynamiquement depuis les serveurs DHCP dédiés situés dans la salle des serveurs. </text:p>
        </text:list-item>
        <text:list-item>
          <text:p text:style-name="P10">Les équipements de la salle des serveurs doivent se voir attribuer des adresses IP de manière statique. </text:p>
        </text:list-item>
        <text:list-item>
          <text:p text:style-name="P10">Utiliser OSPF comme protocole de routage pour annoncer les routes aussi bien sur les routeurs que sur les commutateurs multicouches. </text:p>
        </text:list-item>
        <text:list-item>
          <text:p text:style-name="P10">Configurer le routage statique par défaut pour permettre aux routeurs et aux commutateurs multicouches de transférer tout trafic ne correspondant pas aux <text:soft-page-break/>entrées de la table de routage. Utiliser les adresses IP du prochain saut (next-hop). </text:p>
        </text:list-item>
        <text:list-item>
          <text:p text:style-name="P10">Configurer SSH sur tous les routeurs et commutateurs de couche 3 pour la connexion à distance. </text:p>
        </text:list-item>
        <text:list-item>
          <text:p text:style-name="P10">Configurer la sécurité des ports pour le commutateur du département salle des serveurs afin de n'autoriser qu'un seul équipement à se connecter à un port de commutation, utiliser la méthode sticky pour obtenir l'adresse MAC et configurer le mode de violation en arrêt (shutdown). </text:p>
        </text:list-item>
        <text:list-item>
          <text:p text:style-name="P10">Configurer la règle ACL étendue conjointement avec le VPN site à site (IPSec VPN) pour créer un tunnel et chiffrer les communications entre le siège social (HQ) et le réseau de l'agence (Branch). </text:p>
        </text:list-item>
        <text:list-item>
          <text:p text:style-name="P11">Configurer le PAT pour utiliser l'adresse IPv4 de l'interface du routeur sortant respectif et mettre en œuvre la règle ACL nécessaire.</text:p>
        </text:list-item>
        <text:list-item>
          <text:p text:style-name="P12">Tester la communication, s'assurer que tout ce qui a été configuré fonctionne comme prévu.</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6:40:30.384463498</meta:creation-date>
    <meta:generator>LibreOffice/24.2.7.2$Linux_X86_64 LibreOffice_project/420$Build-2</meta:generator>
    <dc:date>2026-06-18T17:01:18.974959914</dc:date>
    <meta:editing-duration>PT6M38S</meta:editing-duration>
    <meta:editing-cycles>1</meta:editing-cycles>
    <meta:document-statistic meta:table-count="0" meta:image-count="0" meta:object-count="0" meta:page-count="6" meta:paragraph-count="54" meta:word-count="1652" meta:character-count="10771" meta:non-whitespace-character-count="9179"/>
  </office:meta>
</office:document-meta>
</file>