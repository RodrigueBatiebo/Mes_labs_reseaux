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d1760" officeooo:paragraph-rsid="001d1760"/>
    </style:style>
    <style:style style:name="P2" style:family="paragraph" style:parent-style-name="Standard">
      <style:paragraph-properties fo:text-align="start" style:justify-single-word="false"/>
      <style:text-properties officeooo:rsid="001d1760" officeooo:paragraph-rsid="001d1760"/>
    </style:style>
    <style:style style:name="P3" style:family="paragraph" style:parent-style-name="Standard">
      <style:paragraph-properties fo:text-align="start" style:justify-single-word="false"/>
      <style:text-properties officeooo:rsid="001f0588" officeooo:paragraph-rsid="001f0588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d1760" officeooo:paragraph-rsid="001d1760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1d1760" officeooo:paragraph-rsid="001d1760"/>
    </style:style>
    <style:style style:name="P7" style:family="paragraph" style:parent-style-name="Standard" style:list-style-name="L3">
      <style:paragraph-properties fo:text-align="start" style:justify-single-word="false"/>
      <style:text-properties officeooo:rsid="001d1760" officeooo:paragraph-rsid="001d1760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f0588" officeooo:paragraph-rsid="001f0588"/>
    </style:style>
    <style:style style:name="P9" style:family="paragraph" style:parent-style-name="Standard" style:list-style-name="L4">
      <style:paragraph-properties fo:text-align="start" style:justify-single-word="false"/>
      <style:text-properties officeooo:rsid="001f0588" officeooo:paragraph-rsid="001f0588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tape de configuration p2p avec deux antene Ubiquiti</text:p>
      <text:p text:style-name="P1"/>
      <text:list xml:id="list3324269295" text:style-name="L1">
        <text:list-item>
          <text:p text:style-name="P5">Branher l’antenne a un injecteur PoE (port PoE)</text:p>
        </text:list-item>
      </text:list>
      <text:list text:style-name="L2">
        <text:list-item>
          <text:list>
            <text:list-item>
              <text:list>
                <text:list-item>
                  <text:p text:style-name="P6">utiliser le bon PoE selon le modele de l’antene</text:p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Gamme antenne</text:p>
          </table:table-cell>
          <table:table-cell table:style-name="Table1.B1" office:value-type="string">
            <text:p text:style-name="P4">Injecteur PoE requis</text:p>
          </table:table-cell>
        </table:table-row>
        <table:table-row>
          <table:table-cell table:style-name="Table1.A2" office:value-type="string">
            <text:p text:style-name="P4"><text:span text:style-name="Strong_20_Emphasis">AirMax M</text:span> (ancien)</text:p>
          </table:table-cell>
          <table:table-cell table:style-name="Table1.B2" office:value-type="string">
            <text:p text:style-name="P4">PoE <text:span text:style-name="Strong_20_Emphasis">24V passif</text:span></text:p>
          </table:table-cell>
        </table:table-row>
        <table:table-row>
          <table:table-cell table:style-name="Table1.A2" office:value-type="string">
            <text:p text:style-name="P4"><text:span text:style-name="Strong_20_Emphasis">AirMax AC</text:span> (récent)</text:p>
          </table:table-cell>
          <table:table-cell table:style-name="Table1.B2" office:value-type="string">
            <text:p text:style-name="P4">PoE <text:span text:style-name="Strong_20_Emphasis">48V</text:span> (série AC)</text:p>
          </table:table-cell>
        </table:table-row>
      </table:table>
      <text:p text:style-name="P2"/>
      <text:list text:style-name="L3">
        <text:list-item>
          <text:list>
            <text:list-item>
              <text:list>
                <text:list-item>
                  <text:p text:style-name="P7">Comment reconnaitre le bon PoE Ubiquiti :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Modèle PoE</text:p>
          </table:table-cell>
          <table:table-cell table:style-name="Table2.B1" office:value-type="string">
            <text:p text:style-name="P4">Pour quelle gamme</text:p>
          </table:table-cell>
        </table:table-row>
        <table:table-row>
          <table:table-cell table:style-name="Table2.A2" office:value-type="string">
            <text:p text:style-name="P4"><text:span text:style-name="Source_20_Text">POE-24-24W</text:span></text:p>
          </table:table-cell>
          <table:table-cell table:style-name="Table2.B2" office:value-type="string">
            <text:p text:style-name="P4">AirMax <text:span text:style-name="Strong_20_Emphasis">M</text:span> (24V)</text:p>
          </table:table-cell>
        </table:table-row>
        <table:table-row>
          <table:table-cell table:style-name="Table2.A2" office:value-type="string">
            <text:p text:style-name="P4"><text:span text:style-name="Source_20_Text">POE-48-24W</text:span></text:p>
          </table:table-cell>
          <table:table-cell table:style-name="Table2.B2" office:value-type="string">
            <text:p text:style-name="P4">AirMax <text:span text:style-name="Strong_20_Emphasis">AC</text:span> (48V)</text:p>
          </table:table-cell>
        </table:table-row>
        <table:table-row>
          <table:table-cell table:style-name="Table2.A2" office:value-type="string">
            <text:p text:style-name="P4"><text:span text:style-name="Source_20_Text">INJ-48-EU</text:span></text:p>
          </table:table-cell>
          <table:table-cell table:style-name="Table2.B2" office:value-type="string">
            <text:p text:style-name="P4">AirMax <text:span text:style-name="Strong_20_Emphasis">AC</text:span> (48V)</text:p>
          </table:table-cell>
        </table:table-row>
      </table:table>
      <text:p text:style-name="P2"/>
      <text:list text:continue-list="list3324269295" text:style-name="L1">
        <text:list-item>
          <text:p text:style-name="P5">brancher le pc a l’injecteur PoE (Port LAN)</text:p>
        </text:list-item>
        <text:list-item>
          <text:p text:style-name="P5">Configurer l'IP de ton PC pour etre sur le meme reseau que l’antene(192.168.1.20 → l’ip par defaut de l’antene).</text:p>
        </text:list-item>
        <text:list-item>
          <text:p text:style-name="P8">Acceder a l’interface de graphique de config de l’antenne → <text:a xlink:type="simple" xlink:href="https://192.168.1.20/" text:style-name="Internet_20_link" text:visited-style-name="Visited_20_Internet_20_Link">https://192.168.1.20</text:a></text:p>
        </text:list-item>
        <text:list-item>
          <text:p text:style-name="P8">configurer l’antene 1 en AP et l’autre en comme station.</text:p>
        </text:list-item>
      </text:list>
      <text:list text:style-name="L4">
        <text:list-item>
          <text:list>
            <text:list-item>
              <text:list>
                <text:list-item>
                  <text:p text:style-name="P9">Les <text:span text:style-name="Strong_20_Emphasis">2 antennes</text:span> doivent avoir le <text:span text:style-name="Strong_20_Emphasis">même SSID</text:span> (nom du réseau),</text:p>
                </text:list-item>
                <text:list-item>
                  <text:p text:style-name="P9">Les <text:span text:style-name="Strong_20_Emphasis">2 antennes</text:span> doivent avoir le <text:span text:style-name="Strong_20_Emphasis">même mot de passe</text:span></text:p>
                </text:list-item>
                <text:list-item>
                  <text:p text:style-name="P9"><text:span text:style-name="Strong_20_Emphasis">Les 2 antennes doivent être sur la même fréquence</text:span></text:p>
                </text:list-item>
                <text:list-item>
                  <text:p text:style-name="P9"><text:span text:style-name="Strong_20_Emphasis">Seul le mode change → AP / Station</text:span></text:p>
                </text:list-item>
              </text:list>
            </text:list-item>
          </text:list>
        </text:list-item>
      </text:list>
      <text:p text:style-name="P3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6T11:24:05.055436092</meta:creation-date>
    <dc:date>2026-04-16T12:18:12.969089993</dc:date>
    <meta:editing-duration>PT31M24S</meta:editing-duration>
    <meta:editing-cycles>1</meta:editing-cycles>
    <meta:generator>LibreOffice/24.2.7.2$Linux_X86_64 LibreOffice_project/420$Build-2</meta:generator>
    <meta:document-statistic meta:table-count="2" meta:image-count="0" meta:object-count="0" meta:page-count="1" meta:paragraph-count="26" meta:word-count="164" meta:character-count="884" meta:non-whitespace-character-count="757"/>
  </office:meta>
</office:document-meta>
</file>