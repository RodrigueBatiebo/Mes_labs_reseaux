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0fff0a" officeooo:paragraph-rsid="000fff0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fff0a" officeooo:paragraph-rsid="000fff0a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color="#c9211e" loext:opacity="100%" fo:font-size="12pt" fo:font-weight="bold" officeooo:rsid="000fff0a" officeooo:paragraph-rsid="000fff0a" style:font-size-asian="12pt" style:font-weight-asian="bold" style:font-size-complex="12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09fe8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109fe8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09fe8" officeooo:paragraph-rsid="00109fe8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color="#ff0000" loext:opacity="100%" fo:font-weight="bold" officeooo:paragraph-rsid="00109fe8" style:font-weight-asian="bold" style:font-weight-complex="bold"/>
    </style:style>
    <style:style style:name="P8" style:family="paragraph" style:parent-style-name="Text_20_body" style:list-style-name="L2">
      <style:text-properties officeooo:paragraph-rsid="00109fe8"/>
    </style:style>
    <style:style style:name="P9" style:family="paragraph" style:parent-style-name="Text_20_body" style:list-style-name="L2">
      <style:text-properties officeooo:rsid="00124ad4" officeooo:paragraph-rsid="00124ad4"/>
    </style:style>
    <style:style style:name="P10" style:family="paragraph" style:parent-style-name="Text_20_body">
      <style:text-properties officeooo:paragraph-rsid="00124ad4"/>
    </style:style>
    <style:style style:name="P11" style:family="paragraph" style:parent-style-name="Text_20_body" style:list-style-name="L5">
      <style:text-properties officeooo:rsid="00125a19" officeooo:paragraph-rsid="00125a1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color="#000000" loext:opacity="100%" fo:font-weight="normal" officeooo:rsid="00109fe8" style:font-weight-asian="normal" style:font-weight-complex="normal"/>
    </style:style>
    <style:style style:name="T4" style:family="text">
      <style:text-properties fo:color="#000000" loext:opacity="100%" fo:font-size="12pt" fo:font-weight="normal" officeooo:rsid="00109fe8" style:font-size-asian="12pt" style:font-weight-asian="normal" style:font-size-complex="12pt" style:font-weight-complex="normal"/>
    </style:style>
    <style:style style:name="T5" style:family="text">
      <style:text-properties fo:color="#000000" loext:opacity="100%" fo:font-weight="bold" officeooo:rsid="00109fe8" style:font-weight-asian="bold" style:font-weight-complex="bold"/>
    </style:style>
    <style:style style:name="T6" style:family="text">
      <style:text-properties fo:font-weight="normal" officeooo:rsid="00109fe8" style:font-weight-asian="normal" style:font-weight-complex="normal"/>
    </style:style>
    <style:style style:name="T7" style:family="text">
      <style:text-properties officeooo:rsid="00109fe8"/>
    </style:style>
    <style:style style:name="T8" style:family="text">
      <style:text-properties fo:font-weight="bold" officeooo:rsid="00124ad4" style:font-weight-asian="bold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HCP with WINDOWS SERVER</text:p>
      <text:p text:style-name="P2"><text:span text:style-name="T1">Etape 1 : </text:span><text:span text:style-name="T2">Preparer winServer </text:span></text:p>
      <text:list text:style-name="L1">
        <text:list-item>
          <text:p text:style-name="P3"><text:span text:style-name="T2">Ouvrir la boîte "Exécuter" : win + R</text:span></text:p>
        </text:list-item>
        <text:list-item>
          <text:p text:style-name="P3"><text:span text:style-name="T2">taper ncpa.cpl</text:span></text:p>
        </text:list-item>
        <text:list-item>
          <text:p text:style-name="P3"><text:span text:style-name="T2">attribuer une ip static au server</text:span></text:p>
        </text:list-item>
      </text:list>
      <text:p text:style-name="P2"><text:span text:style-name="T2"/></text:p>
      <text:p text:style-name="P5"><text:span text:style-name="T5">Etape 2 :</text:span><text:span text:style-name="T3"> </text:span><text:span text:style-name="T2">Installer le rôle DHCP</text:span></text:p>
      <text:list text:style-name="L2">
        <text:list-item>
          <text:p text:style-name="P6"><text:span text:style-name="T2">rechercher Gestion de serveur</text:span></text:p>
        </text:list-item>
        <text:list-item>
          <text:p text:style-name="P6"><text:span text:style-name="T2">Clique sur "Ajouter des rôles et fonctionnalités" </text:span></text:p>
        </text:list-item>
        <text:list-item>
          <text:p text:style-name="P4"><text:span text:style-name="T4">Laisse "Installation basée sur un rôle ou une fonctionnalité" coché, puis clique sur Suivant. </text:span><text:span text:style-name="T2">Après avoir cliqué "Suivant" deux fois (sélection serveur → rôles), tu arrives sur la liste des rôles. Coche "Serveur DHCP".</text:span></text:p>
          <text:list>
            <text:list-item>
              <text:p text:style-name="P7"><text:span text:style-name="T7">Important : </text:span></text:p>
              <text:list>
                <text:list-item>
                  <text:p text:style-name="P4"><text:span text:style-name="Source_20_Text"><text:span text:style-name="T10">192.168.142.132</text:span></text:span><text:span text:style-name="T10"> </text:span><text:span text:style-name="T2">→ c'est la carte de gestion de GNS3/VMware, attribuée automatiquement. C'est elle que le Gestionnaire de serveur voit en premier. </text:span></text:p>
                </text:list-item>
                <text:list-item>
                  <text:p text:style-name="P8"><text:span text:style-name="Source_20_Text"><text:span text:style-name="T9">192.168.1.10</text:span></text:span> → c'est la carte que tu as configurée manuellement, celle connectée à ton lab.</text:p>
                </text:list-item>
              </text:list>
            </text:list-item>
          </text:list>
        </text:list-item>
        <text:list-item>
          <text:p text:style-name="P9">Laisser la page Foctionnalite par defaut et cliquer sur suivant.</text:p>
        </text:list-item>
        <text:list-item>
          <text:p text:style-name="P9">Maintenant, clique sur le lien <text:span text:style-name="Strong_20_Emphasis">"Terminer la configuration DHCP"</text:span> en orange/jaune directement dans cette fenêtre</text:p>
        </text:list-item>
      </text:list>
      <text:p text:style-name="P10"><text:span text:style-name="T8">Etape 3 : </text:span>créer l'étendue DHCP</text:p>
      <text:list text:style-name="L5">
        <text:list-item>
          <text:p text:style-name="P11">DHCP (barre a gauche) → outils (en haut a droite) → DHCP → win - …. → ipv4 → autres actions → nouvelle etendu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3T17:30:26.583625490</meta:creation-date>
    <dc:date>2026-05-23T23:05:11.845812400</dc:date>
    <meta:editing-duration>PT4H43M31S</meta:editing-duration>
    <meta:editing-cycles>1</meta:editing-cycles>
    <meta:document-statistic meta:table-count="0" meta:image-count="0" meta:object-count="0" meta:page-count="1" meta:paragraph-count="16" meta:word-count="182" meta:character-count="1040" meta:non-whitespace-character-count="882"/>
    <meta:generator>LibreOffice/24.2.7.2$Linux_X86_64 LibreOffice_project/420$Build-2</meta:generator>
  </office:meta>
</office:document-meta>
</file>