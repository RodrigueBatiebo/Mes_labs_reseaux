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19D5E91693B.png" manifest:media-type="image/png"/>
  <manifest:file-entry manifest:full-path="Pictures/100000010000031B00000118DB296C32.png" manifest:media-type="image/png"/>
  <manifest:file-entry manifest:full-path="Pictures/100000010000031B00000118D12ADD3A.png" manifest:media-type="image/png"/>
  <manifest:file-entry manifest:full-path="Pictures/1000000100000311000001E2A8483A16.png" manifest:media-type="image/png"/>
  <manifest:file-entry manifest:full-path="Pictures/1000000100000305000001E3B9A678F7.png" manifest:media-type="image/png"/>
  <manifest:file-entry manifest:full-path="Pictures/1000000100000312000001CBB3B76B32.png" manifest:media-type="image/png"/>
  <manifest:file-entry manifest:full-path="Pictures/1000000100000312000001CB7705CE93.png" manifest:media-type="image/png"/>
  <manifest:file-entry manifest:full-path="Pictures/1000000100000314000001E60B5772B7.png" manifest:media-type="image/png"/>
  <manifest:file-entry manifest:full-path="Pictures/10000001000003DB000002A5CFB997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2e72c" officeooo:paragraph-rsid="0012e72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ccc6d" officeooo:paragraph-rsid="001ccc6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officeooo:rsid="001313d6" officeooo:paragraph-rsid="0012e72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431d8" officeooo:paragraph-rsid="001431d8"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ccc6d" officeooo:paragraph-rsid="001ccc6d" style:font-size-asian="14pt" style:font-weight-asian="normal" style:font-size-complex="16pt" style:font-weight-complex="normal"/>
    </style:style>
    <style:style style:name="P7" style:family="paragraph" style:parent-style-name="Text_20_body">
      <style:paragraph-properties fo:margin-left="0cm" fo:margin-right="0cm" fo:margin-top="0cm" fo:margin-bottom="0cm" style:contextual-spacing="false" fo:text-indent="0cm" style:auto-text-indent="false"/>
      <style:text-properties fo:font-size="16pt" fo:font-weight="normal" officeooo:rsid="0017ee6a" officeooo:paragraph-rsid="0017ee6a" style:font-size-asian="14pt" style:font-weight-asian="normal" style:font-size-complex="16pt" style:font-weight-complex="normal"/>
    </style:style>
    <style:style style:name="P8" style:family="paragraph" style:parent-style-name="Text_20_body">
      <style:paragraph-properties fo:margin-left="0cm" fo:margin-right="0cm" fo:margin-top="0cm" fo:margin-bottom="0cm" style:contextual-spacing="false" fo:text-indent="0cm" style:auto-text-indent="false"/>
      <style:text-properties fo:font-size="16pt" officeooo:rsid="00199092" officeooo:paragraph-rsid="00199092" style:font-size-asian="16pt" style:font-size-complex="16pt"/>
    </style:style>
    <style:style style:name="P9" style:family="paragraph" style:parent-style-name="Standard">
      <style:paragraph-properties fo:text-align="start" style:justify-single-word="false"/>
      <style:text-properties officeooo:paragraph-rsid="00152d8c"/>
    </style:style>
    <style:style style:name="P10" style:family="paragraph" style:parent-style-name="Text_20_body">
      <style:paragraph-properties fo:text-align="start" style:justify-single-word="false"/>
      <style:text-properties officeooo:paragraph-rsid="00152d8c"/>
    </style:style>
    <style:style style:name="P11"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12" style:family="paragraph" style:parent-style-name="Standard">
      <style:paragraph-properties fo:text-align="start" style:justify-single-word="false"/>
      <style:text-properties fo:color="#c9211e" loext:opacity="100%" fo:font-size="14pt" fo:font-weight="normal" officeooo:rsid="001431d8" officeooo:paragraph-rsid="001431d8"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officeooo:rsid="0017ee6a" officeooo:paragraph-rsid="0017ee6a"/>
    </style:style>
    <style:style style:name="P14" style:family="paragraph" style:parent-style-name="Standard">
      <style:paragraph-properties fo:text-align="start" style:justify-single-word="false"/>
      <style:text-properties officeooo:rsid="001c75a5" officeooo:paragraph-rsid="001c75a5"/>
    </style:style>
    <style:style style:name="P15" style:family="paragraph" style:parent-style-name="Text_20_body">
      <style:paragraph-properties fo:margin-left="0cm" fo:margin-right="0cm" fo:margin-top="0cm" fo:margin-bottom="0cm" style:contextual-spacing="false" fo:text-indent="0cm" style:auto-text-indent="false"/>
      <style:text-properties officeooo:rsid="001c75a5" officeooo:paragraph-rsid="001c75a5"/>
    </style:style>
    <style:style style:name="P16" style:family="paragraph" style:parent-style-name="Standard">
      <style:paragraph-properties fo:text-align="start" style:justify-single-word="false"/>
      <style:text-properties fo:color="#ffff00" loext:opacity="100%" fo:font-size="16pt" fo:font-weight="normal" officeooo:rsid="001c75a5" officeooo:paragraph-rsid="001c75a5"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color="#ffff00" loext:opacity="100%" fo:font-size="16pt" fo:font-weight="normal" officeooo:rsid="001ccc6d" officeooo:paragraph-rsid="001ccc6d" style:font-size-asian="14pt" style:font-weight-asian="normal" style:font-size-complex="16pt"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margin-top="0cm" fo:margin-bottom="0cm" style:contextual-spacing="false" fo:text-indent="0cm" style:auto-text-indent="false"/>
    </style:style>
    <style:style style:name="P20" style:family="paragraph" style:parent-style-name="Text_20_body">
      <style:paragraph-properties fo:text-align="start" style:justify-single-word="false"/>
      <style:text-properties fo:font-size="12pt" officeooo:rsid="0017ee6a" officeooo:paragraph-rsid="0017ee6a" style:font-size-asian="12pt" style:font-size-complex="12pt"/>
    </style:style>
    <style:style style:name="P21" style:family="paragraph" style:parent-style-name="Text_20_body">
      <style:paragraph-properties fo:text-align="start" style:justify-single-word="false"/>
      <style:text-properties officeooo:rsid="0016a610" officeooo:paragraph-rsid="0016a610"/>
    </style:style>
    <style:style style:name="P22" style:family="paragraph" style:parent-style-name="Text_20_body">
      <style:paragraph-properties fo:margin-left="0cm" fo:margin-right="0cm" fo:margin-top="0cm" fo:margin-bottom="0cm" style:contextual-spacing="false" fo:text-indent="0cm" style:auto-text-indent="false"/>
      <style:text-properties fo:color="#ff0000" loext:opacity="100%" fo:font-size="16pt" officeooo:rsid="001b1a2a" officeooo:paragraph-rsid="001b1a2a" style:font-size-asian="16pt" style:font-size-complex="16pt"/>
    </style:style>
    <style:style style:name="P23" style:family="paragraph" style:parent-style-name="Text_20_body">
      <style:paragraph-properties fo:margin-left="0cm" fo:margin-right="0cm" fo:margin-top="0cm" fo:margin-bottom="0cm" style:contextual-spacing="false" fo:text-indent="0cm" style:auto-text-indent="false"/>
      <style:text-properties officeooo:paragraph-rsid="00184e93"/>
    </style:style>
    <style:style style:name="P24" style:family="paragraph" style:parent-style-name="Text_20_body">
      <style:paragraph-properties fo:margin-left="0cm" fo:margin-right="0cm" fo:margin-top="0cm" fo:margin-bottom="0cm" style:contextual-spacing="false" fo:text-indent="0cm" style:auto-text-indent="false"/>
      <style:text-properties officeooo:rsid="00199092" officeooo:paragraph-rsid="00199092"/>
    </style:style>
    <style:style style:name="P25" style:family="paragraph" style:parent-style-name="Text_20_body">
      <style:paragraph-properties fo:margin-top="0cm" fo:margin-bottom="0cm" style:contextual-spacing="false"/>
      <style:text-properties officeooo:rsid="00199092" officeooo:paragraph-rsid="00199092"/>
    </style:style>
    <style:style style:name="P26" style:family="paragraph" style:parent-style-name="Text_20_body">
      <style:paragraph-properties fo:margin-left="0cm" fo:margin-right="0cm" fo:margin-top="0cm" fo:margin-bottom="0cm" style:contextual-spacing="false" fo:text-indent="0cm" style:auto-text-indent="false"/>
      <style:text-properties officeooo:rsid="00199092" officeooo:paragraph-rsid="001c75a5"/>
    </style:style>
    <style:style style:name="P27" style:family="paragraph" style:parent-style-name="Text_20_body">
      <style:paragraph-properties fo:margin-left="0cm" fo:margin-right="0cm" fo:margin-top="0cm" fo:margin-bottom="0cm" style:contextual-spacing="false" fo:text-indent="0cm" style:auto-text-indent="false"/>
      <style:text-properties officeooo:paragraph-rsid="001b1a2a"/>
    </style:style>
    <style:style style:name="P28" style:family="paragraph" style:parent-style-name="Text_20_body">
      <style:paragraph-properties fo:margin-top="0cm" fo:margin-bottom="0cm" style:contextual-spacing="false"/>
      <style:text-properties officeooo:rsid="001b1a2a" officeooo:paragraph-rsid="001b1a2a"/>
    </style:style>
    <style:style style:name="P29" style:family="paragraph" style:parent-style-name="Text_20_body">
      <style:paragraph-properties fo:margin-left="0cm" fo:margin-right="0cm" fo:margin-top="0cm" fo:margin-bottom="0cm" style:contextual-spacing="false" fo:text-indent="0cm" style:auto-text-indent="false"/>
      <style:text-properties officeooo:paragraph-rsid="001c75a5"/>
    </style:style>
    <style:style style:name="P30" style:family="paragraph" style:parent-style-name="Standard" style:list-style-name="L1">
      <style:paragraph-properties fo:text-align="start" style:justify-single-word="false"/>
      <style:text-properties fo:font-size="16pt" fo:font-weight="normal" officeooo:rsid="001431d8" officeooo:paragraph-rsid="001431d8" style:font-size-asian="14pt" style:font-weight-asian="normal" style:font-size-complex="16pt" style:font-weight-complex="normal"/>
    </style:style>
    <style:style style:name="P31" style:family="paragraph" style:parent-style-name="Standard" style:list-style-name="L2">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32" style:family="paragraph" style:parent-style-name="Standard" style:list-style-name="L3">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33" style:family="paragraph" style:parent-style-name="Standard" style:list-style-name="L2">
      <style:paragraph-properties fo:text-align="start" style:justify-single-word="false" fo:break-before="page"/>
      <style:text-properties fo:color="#000000" loext:opacity="100%" fo:font-size="16pt" fo:font-weight="normal" officeooo:rsid="0014c589" officeooo:paragraph-rsid="00152d8c"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color="#000000" loext:opacity="100%" fo:font-size="16pt" fo:font-weight="normal" officeooo:rsid="001ccc6d" officeooo:paragraph-rsid="001ccc6d" style:font-size-asian="14pt" style:font-weight-asian="normal" style:font-size-complex="16pt" style:font-weight-complex="normal"/>
    </style:style>
    <style:style style:name="P35" style:family="paragraph" style:parent-style-name="Standard">
      <style:paragraph-properties fo:text-align="center" style:justify-single-word="false"/>
      <style:text-properties fo:color="#000000" loext:opacity="100%" fo:font-size="16pt" fo:font-weight="bold" officeooo:rsid="001ccc6d" officeooo:paragraph-rsid="001ccc6d" style:font-size-asian="14pt" style:font-weight-asian="bold" style:font-size-complex="16pt" style:font-weight-complex="bold"/>
    </style:style>
    <style:style style:name="P36" style:family="paragraph" style:parent-style-name="Standard" style:list-style-name="L7">
      <style:paragraph-properties fo:text-align="start" style:justify-single-word="false"/>
      <style:text-properties officeooo:rsid="001c75a5" officeooo:paragraph-rsid="001c75a5"/>
    </style:style>
    <style:style style:name="P37" style:family="paragraph" style:parent-style-name="Text_20_body" style:list-style-name="L3">
      <style:paragraph-properties fo:text-align="start" style:justify-single-word="false"/>
      <style:text-properties fo:font-size="12pt" fo:font-weight="normal" officeooo:rsid="001431d8" officeooo:paragraph-rsid="00152d8c" style:font-size-asian="12pt" style:font-weight-asian="normal" style:font-size-complex="12pt" style:font-weight-complex="normal"/>
    </style:style>
    <style:style style:name="P38" style:family="paragraph" style:parent-style-name="Text_20_body" style:list-style-name="L3">
      <style:paragraph-properties fo:text-align="start" style:justify-single-word="false"/>
      <style:text-properties officeooo:paragraph-rsid="00152d8c"/>
    </style:style>
    <style:style style:name="P39" style:family="paragraph" style:parent-style-name="Text_20_body" style:list-style-name="L4">
      <style:paragraph-properties fo:margin-left="0cm" fo:margin-right="0cm" fo:margin-top="0cm" fo:margin-bottom="0cm" style:contextual-spacing="false" fo:text-indent="0cm" style:auto-text-indent="false"/>
      <style:text-properties officeooo:paragraph-rsid="00184e93"/>
    </style:style>
    <style:style style:name="P40" style:family="paragraph" style:parent-style-name="Text_20_body" style:list-style-name="L5">
      <style:paragraph-properties fo:margin-left="0cm" fo:margin-right="0cm" fo:margin-top="0cm" fo:margin-bottom="0cm" style:contextual-spacing="false" fo:text-indent="0cm" style:auto-text-indent="false"/>
      <style:text-properties fo:font-size="16pt" fo:font-weight="normal" officeooo:rsid="0017ee6a" officeooo:paragraph-rsid="00184e93" style:font-size-asian="14pt" style:font-weight-asian="normal" style:font-size-complex="16pt" style:font-weight-complex="normal"/>
    </style:style>
    <style:style style:name="P41" style:family="paragraph" style:parent-style-name="Text_20_body" style:list-style-name="L6">
      <style:paragraph-properties fo:margin-top="0cm" fo:margin-bottom="0cm" style:contextual-spacing="false"/>
      <style:text-properties officeooo:rsid="00199092" officeooo:paragraph-rsid="00199092"/>
    </style:style>
    <style:style style:name="P42" style:family="paragraph" style:parent-style-name="Text_20_body" style:list-style-name="L8">
      <style:paragraph-properties fo:margin-top="0cm" fo:margin-bottom="0cm" style:contextual-spacing="false"/>
      <style:text-properties officeooo:rsid="001c75a5" officeooo:paragraph-rsid="001c75a5"/>
    </style:style>
    <style:style style:name="T1" style:family="text">
      <style:text-properties fo:color="#000000" loext:opacity="100%"/>
    </style:style>
    <style:style style:name="T2" style:family="text">
      <style:text-properties fo:color="#000000" loext:opacity="100%" officeooo:rsid="0014c589"/>
    </style:style>
    <style:style style:name="T3" style:family="text">
      <style:text-properties fo:color="#000000" loext:opacity="100%" officeooo:rsid="00152d8c"/>
    </style:style>
    <style:style style:name="T4" style:family="text">
      <style:text-properties fo:color="#000000" loext:opacity="100%" fo:font-size="12pt" officeooo:rsid="0014c589" style:font-size-asian="12pt" style:font-size-complex="12pt"/>
    </style:style>
    <style:style style:name="T5" style:family="text">
      <style:text-properties fo:color="#000000" loext:opacity="100%" fo:font-size="12pt" fo:font-weight="bold" officeooo:rsid="0014c589" style:font-size-asian="12pt" style:font-weight-asian="bold" style:font-size-complex="12pt" style:font-weight-complex="bold"/>
    </style:style>
    <style:style style:name="T6" style:family="text">
      <style:text-properties fo:color="#000000" loext:opacity="100%" fo:font-size="12pt" fo:font-weight="bold" officeooo:rsid="00152d8c" style:font-size-asian="12pt" style:font-weight-asian="bold" style:font-size-complex="12pt" style:font-weight-complex="bold"/>
    </style:style>
    <style:style style:name="T7" style:family="text">
      <style:text-properties fo:color="#000000" loext:opacity="100%" fo:font-size="12pt" fo:font-weight="normal" officeooo:rsid="00152d8c" style:font-size-asian="12pt" style:font-weight-asian="normal" style:font-size-complex="12pt" style:font-weight-complex="normal"/>
    </style:style>
    <style:style style:name="T8" style:family="text">
      <style:text-properties fo:color="#000000" loext:opacity="100%" fo:font-size="16pt" officeooo:rsid="00152d8c" style:font-size-asian="14pt" style:font-size-complex="16pt"/>
    </style:style>
    <style:style style:name="T9" style:family="text">
      <style:text-properties fo:color="#000000" loext:opacity="100%" fo:font-size="16pt" fo:font-weight="normal" style:font-size-asian="14pt" style:font-weight-asian="normal" style:font-size-complex="16pt" style:font-weight-complex="normal"/>
    </style:style>
    <style:style style:name="T10" style:family="text">
      <style:text-properties fo:color="#000000" loext:opacity="100%" fo:font-size="16pt" fo:font-weight="normal" officeooo:rsid="0014c589" style:font-size-asian="14pt" style:font-weight-asian="normal" style:font-size-complex="16pt" style:font-weight-complex="normal"/>
    </style:style>
    <style:style style:name="T11" style:family="text">
      <style:text-properties fo:color="#000000" loext:opacity="100%" fo:font-size="16pt" fo:font-weight="normal" officeooo:rsid="0017ee6a" style:font-size-asian="14pt" style:font-weight-asian="normal" style:font-size-complex="16pt" style:font-weight-complex="normal"/>
    </style:style>
    <style:style style:name="T12" style:family="text">
      <style:text-properties fo:color="#000000" loext:opacity="100%" officeooo:rsid="001431d8"/>
    </style:style>
    <style:style style:name="T13" style:family="text">
      <style:text-properties fo:color="#000000" loext:opacity="100%" fo:font-weight="normal" style:font-weight-asian="normal" style:font-weight-complex="normal"/>
    </style:style>
    <style:style style:name="T14" style:family="text">
      <style:text-properties fo:color="#000000" loext:opacity="100%" fo:font-weight="normal" fo:background-color="transparent" loext:char-shading-value="0" style:font-weight-asian="normal" style:font-weight-complex="normal"/>
    </style:style>
    <style:style style:name="T15" style:family="text">
      <style:text-properties fo:color="#000000" loext:opacity="100%" fo:font-weight="bold" style:font-weight-asian="bold" style:font-weight-complex="bold"/>
    </style:style>
    <style:style style:name="T16" style:family="text">
      <style:text-properties fo:color="#000000" loext:opacity="100%" fo:font-size="14pt" fo:font-weight="normal" officeooo:rsid="0014c589" style:font-size-asian="14pt" style:font-weight-asian="normal" style:font-size-complex="14pt" style:font-weight-complex="normal"/>
    </style:style>
    <style:style style:name="T17" style:family="text">
      <style:text-properties fo:color="#000000" loext:opacity="100%" fo:font-size="14pt" fo:font-weight="normal" officeooo:rsid="00152d8c" style:font-size-asian="14pt" style:font-weight-asian="normal" style:font-size-complex="14pt" style:font-weight-complex="normal"/>
    </style:style>
    <style:style style:name="T18" style:family="text">
      <style:text-properties fo:color="#000000" loext:opacity="100%" fo:font-size="14pt" fo:font-weight="normal" officeooo:rsid="00184e93" style:font-size-asian="14pt" style:font-weight-asian="normal" style:font-size-complex="14pt" style:font-weight-complex="normal"/>
    </style:style>
    <style:style style:name="T19" style:family="text">
      <style:text-properties fo:color="#000000" loext:opacity="100%" fo:font-size="14pt" style:font-size-asian="14pt" style:font-size-complex="14pt"/>
    </style:style>
    <style:style style:name="T20" style:family="text">
      <style:text-properties fo:color="#000000" loext:opacity="100%" officeooo:rsid="00184e93"/>
    </style:style>
    <style:style style:name="T21" style:family="text">
      <style:text-properties fo:color="#000000" loext:opacity="100%" fo:font-size="18pt" style:font-size-asian="18pt" style:font-size-complex="18pt"/>
    </style:style>
    <style:style style:name="T22" style:family="text">
      <style:text-properties fo:color="#000000" loext:opacity="100%" fo:font-size="18pt" officeooo:rsid="0014c589" style:font-size-asian="18pt" style:font-size-complex="18pt"/>
    </style:style>
    <style:style style:name="T23" style:family="text">
      <style:text-properties fo:color="#000000" loext:opacity="100%" fo:font-size="18pt" officeooo:rsid="001c75a5" style:font-size-asian="18pt" style:font-size-complex="18pt"/>
    </style:style>
    <style:style style:name="T24" style:family="text">
      <style:text-properties fo:color="#000000" loext:opacity="100%" fo:font-size="18pt" officeooo:rsid="001ccc6d" style:font-size-asian="18pt" style:font-size-complex="18pt"/>
    </style:style>
    <style:style style:name="T25" style:family="text">
      <style:text-properties officeooo:rsid="0014c589"/>
    </style:style>
    <style:style style:name="T26" style:family="text">
      <style:text-properties officeooo:rsid="00152d8c"/>
    </style:style>
    <style:style style:name="T27" style:family="text">
      <style:text-properties fo:font-weight="bold" style:font-weight-asian="bold" style:font-weight-complex="bold"/>
    </style:style>
    <style:style style:name="T28" style:family="text">
      <style:text-properties fo:font-weight="bold" officeooo:rsid="001b1a2a" style:font-weight-asian="bold" style:font-weight-complex="bold"/>
    </style:style>
    <style:style style:name="T29" style:family="text">
      <style:text-properties officeooo:rsid="0016a610"/>
    </style:style>
    <style:style style:name="T30" style:family="text">
      <style:text-properties fo:color="#ff0000" loext:opacity="100%" fo:font-size="16pt" fo:font-weight="normal" officeooo:rsid="0017ee6a" style:font-size-asian="14pt" style:font-weight-asian="normal" style:font-size-complex="16pt" style:font-weight-complex="normal"/>
    </style:style>
    <style:style style:name="T31" style:family="text">
      <style:text-properties officeooo:rsid="001b1a2a"/>
    </style:style>
    <style:style style:name="T32" style:family="text">
      <style:text-properties fo:color="#ffff00" loext:opacity="100%"/>
    </style:style>
    <style:style style:name="T33" style:family="text">
      <style:text-properties fo:color="#ffff00" loext:opacity="100%" fo:background-color="transparent" loext:char-shading-value="0"/>
    </style:style>
    <style:style style:name="T34" style:family="text">
      <style:text-properties fo:color="#ffff00" loext:opacity="100%" officeooo:rsid="0014c589" fo:background-color="transparent" loext:char-shading-value="0"/>
    </style:style>
    <style:style style:name="T35" style:family="text">
      <style:text-properties officeooo:rsid="001c75a5"/>
    </style:style>
    <style:style style:name="T36"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3">L’administration à distance des équipements réseaux est aujourd’hui l’une des pratiques les plus prisées. Elle offre aux techniciens la possibilité de diagnostiquer et de résoudre des problèmes sans avoir à se déplacer physiquement sur site. </text:p>
      <text:p text:style-name="P3"/>
      <text:p text:style-name="P3">Dans cet article, nous allons découvrir un moyen efficace d’assurer cette administration à distance : le protocole Telnet. Pour illustrer son fonctionnement, nous utiliserons l’émulateur Cisco Packet Tracer.</text:p>
      <text:p text:style-name="P4">Nous allors d’abord configurer deux equipements : un switch de neveau 2 et un routeur auquels nous allons ensuite acceder a distance sur un ordinateur.</text:p>
      <text:p text:style-name="P3"/>
      <text:list text:style-name="L1">
        <text:list-item>
          <text:p text:style-name="P30">Configuration des equipements</text:p>
          <text:p text:style-name="P30"><text:s/></text:p>
          <text:list>
            <text:list-item>
              <text:p text:style-name="P30">Placer et relier les equipement<text:span text:style-name="T29">s</text:span> avec les cable<text:span text:style-name="T29">s</text:span> adequats.</text:p>
            </text:list-item>
          </text:list>
        </text:list-item>
      </text:list>
      <text:p text:style-name="P4"><draw:frame draw:style-name="fr1" draw:name="Image1" text:anchor-type="char" svg:x="0.353cm" svg:y="0.52cm" svg:width="17cm" svg:height="9.308cm" draw:z-index="0"><draw:image xlink:href="Pictures/10000001000003DB000002A5CFB99756.png" xlink:type="simple" xlink:show="embed" xlink:actuate="onLoad" draw:mime-type="image/png"/></draw:frame></text:p>
      <text:p text:style-name="P4"/>
      <text:p text:style-name="P4"><text:tab/>2.<text:span text:style-name="T25">adressage et </text:span><text:s/>Configuration <text:span text:style-name="T26">du protocole sur </text:span><text:s/><text:span text:style-name="T26">le</text:span> switch 2960-24TT</text:p>
      <text:p text:style-name="P4"/>
      <text:p text:style-name="P12">important :<text:span text:style-name="T1"> le switch de niveau 2 possede une interface virtuelle nommer Vlan1 auquel nous allons affecter une adresse ip. </text:span><text:span text:style-name="T2">La configuration autorisera un acces </text:span><text:span text:style-name="T3">en </text:span><text:span text:style-name="T2">simultanee au switch de deux utilisateur</text:span><text:span text:style-name="T20">s</text:span><text:span text:style-name="T2">.</text:span></text:p>
      <text:p text:style-name="P12"><text:span text:style-name="T1"/></text:p>
      <text:p text:style-name="P12"><text:span text:style-name="T1"/></text:p>
      <text:list text:style-name="L2">
        <text:list-item>
          <text:p text:style-name="P33">Adressage</text:p>
          <text:p text:style-name="P31"><text:span text:style-name="T4"/></text:p>
          <text:p text:style-name="P31"><text:span text:style-name="T4"/></text:p>
          <text:p text:style-name="P31"><text:span text:style-name="T4">Switch&gt;</text:span><text:span text:style-name="T5">enable</text:span></text:p>
        </text:list-item>
      </text:list>
      <text:p text:style-name="P11"><text:tab/>Switch#<text:span text:style-name="T27">configure terminal</text:span></text:p>
      <text:p text:style-name="P11"><text:tab/>Switch(config)#<text:span text:style-name="T27">interface vlan 1</text:span></text:p>
      <text:p text:style-name="P11"><text:tab/>Switch(config-if)#<text:span text:style-name="T27">ip address 192.168.1.6 255.255.255.0</text:span></text:p>
      <text:p text:style-name="P11"><text:tab/>Switch(config-if)#<text:span text:style-name="T27">no shutdown</text:span></text:p>
      <text:p text:style-name="P5"><draw:frame draw:style-name="fr1" draw:name="Image2" text:anchor-type="char" svg:x="0.041cm" svg:y="0.646cm" svg:width="16.365cm" svg:height="7.146cm" draw:z-index="1"><draw:image xlink:href="Pictures/1000000100000312000001CB7705CE93.png" xlink:type="simple" xlink:show="embed" xlink:actuate="onLoad" draw:mime-type="image/png"/></draw:frame><text:span text:style-name="T2"/></text:p>
      <text:list text:style-name="L3">
        <text:list-item>
          <text:p text:style-name="P32"><text:span text:style-name="T2">Configuration </text:span><text:span text:style-name="T3">du protocole</text:span></text:p>
          <text:p text:style-name="P37"><text:span text:style-name="T8"/></text:p>
          <text:p text:style-name="P38"><text:span text:style-name="T7">Switch#</text:span><text:span text:style-name="T6">configure terminal</text:span></text:p>
        </text:list-item>
      </text:list>
      <text:p text:style-name="P19"><text:tab/>Switch(config)#<text:span text:style-name="T27">username</text:span> rodrigue1 <text:span text:style-name="T27">privilege 15</text:span> <text:span text:style-name="T27">secret</text:span> rodrigue1@</text:p>
      <text:p text:style-name="P19"><text:tab/>Switch(config)#<text:span text:style-name="T27">username</text:span> rodrigue2 <text:span text:style-name="T27">privilege 15</text:span> <text:span text:style-name="T27">secret</text:span> rodrigue2@</text:p>
      <text:p text:style-name="P19"><text:tab/>Switch(config)#<text:span text:style-name="T27">enable secret</text:span> admin1234</text:p>
      <text:p text:style-name="P19"><text:tab/>Switch(config)#<text:span text:style-name="T27">line vty</text:span> 0 1</text:p>
      <text:p text:style-name="P19"><text:tab/>Switch(config-line)#<text:span text:style-name="T27">password</text:span> p@ssword1234</text:p>
      <text:p text:style-name="P19"><text:tab/>Switch(config-line)#<text:span text:style-name="T27">login local</text:span></text:p>
      <text:p text:style-name="P19"><text:tab/>Switch(config-line)#<text:span text:style-name="T27">transport input telnet</text:span></text:p>
      <text:p text:style-name="P19"><text:tab/>Switch(config-line)#<text:span text:style-name="T27">end</text:span></text:p>
      <text:p text:style-name="P19"><text:tab/>Switch#<text:span text:style-name="T27">write memory</text:span></text:p>
      <text:p text:style-name="P19"><text:tab/></text:p>
      <text:p text:style-name="P10"><text:span text:style-name="T3"/></text:p>
      <text:p text:style-name="P21"><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oft-page-break/><text:span text:style-name="T3"/></text:p>
      <text:p text:style-name="P19"><draw:frame draw:style-name="fr1" draw:name="Image3" text:anchor-type="char" svg:x="-0.005cm" svg:y="0.464cm" svg:width="16.365cm" svg:height="8.475cm" draw:z-index="2"><draw:image xlink:href="Pictures/1000000100000312000001CBB3B76B32.png" xlink:type="simple" xlink:show="embed" xlink:actuate="onLoad" draw:mime-type="image/png"/></draw:frame><text:span text:style-name="T3"/></text:p>
      <text:p text:style-name="P19"><text:span text:style-name="T3"/></text:p>
      <text:p text:style-name="P7"><text:span text:style-name="T3">3. </text:span><text:span text:style-name="T2">adressage et </text:span><text:span text:style-name="T12"><text:s/>Configuration </text:span><text:span text:style-name="T3">du protocole sur </text:span><text:span text:style-name="T12"><text:s/></text:span><text:span text:style-name="T3">le</text:span><text:span text:style-name="T12"> </text:span><text:span text:style-name="T1">router</text:span></text:p>
      <text:p text:style-name="P7"><text:span text:style-name="T1"/></text:p>
      <text:p text:style-name="P23"><text:span text:style-name="T30">important : </text:span><text:span text:style-name="T11">Nous allons affecter l’adresse ip 192.168.1.1 au port Gig0/0/0 du routeur puis configurer le protocole telnet.</text:span><text:span text:style-name="T16">La configuration autorisera un acces </text:span><text:span text:style-name="T17">en </text:span><text:span text:style-name="T16">simultanee au switch de </text:span><text:span text:style-name="T18">trois</text:span><text:span text:style-name="T16"> utilisateur</text:span><text:span text:style-name="T18">s</text:span><text:span text:style-name="T16">.</text:span></text:p>
      <text:p text:style-name="P23"><text:span text:style-name="T11"/></text:p>
      <text:list text:style-name="L4">
        <text:list-item>
          <text:p text:style-name="P39"><text:span text:style-name="T10">A</text:span><text:span text:style-name="T11">dressge</text:span></text:p>
        </text:list-item>
      </text:list>
      <text:p text:style-name="P13"><text:span text:style-name="T9"/></text:p>
      <text:p text:style-name="P20"><text:span text:style-name="T13"><text:tab/>Router&gt;</text:span><text:span text:style-name="T15">enable</text:span></text:p>
      <text:p text:style-name="P19"><text:tab/>Router#<text:span text:style-name="T27">conf t</text:span></text:p>
      <text:p text:style-name="P19"><text:tab/>Router(config)#<text:span text:style-name="T27">int Gig0/0/0</text:span></text:p>
      <text:p text:style-name="P19"><text:tab/>Router(config-if)#<text:span text:style-name="T27">ip address 192.168.1.1 255.255.255.0</text:span></text:p>
      <text:p text:style-name="P19"><text:tab/>Router(config-if)#<text:span text:style-name="T27">no shutdown</text:span></text:p>
      <text:p text:style-name="P18"><draw:frame draw:style-name="fr4" draw:name="Image4" text:anchor-type="char" svg:width="17cm" svg:height="10.485cm" draw:z-index="3"><draw:image xlink:href="Pictures/1000000100000314000001E60B5772B7.png" xlink:type="simple" xlink:show="embed" xlink:actuate="onLoad" draw:mime-type="image/png"/></draw:frame><text:soft-page-break/></text:p>
      <text:list text:style-name="L5">
        <text:list-item>
          <text:p text:style-name="P40"><text:span text:style-name="T12">Configuration </text:span><text:span text:style-name="T3">du protocole</text:span></text:p>
        </text:list-item>
      </text:list>
      <text:p text:style-name="P9"><text:span text:style-name="T10"/></text:p>
      <text:p text:style-name="P19">Router(config-if)#<text:span text:style-name="T27">exit</text:span></text:p>
      <text:p text:style-name="P19">Router(config)#<text:span text:style-name="T27">username</text:span> rodrigue1<text:span text:style-name="T27"> privilege 15</text:span> <text:span text:style-name="T27">secret</text:span> rodrigue1@</text:p>
      <text:p text:style-name="P19">Router(config)#<text:span text:style-name="T27">username</text:span> rodrigue2 <text:span text:style-name="T27">privilege 15</text:span> <text:span text:style-name="T27">secret</text:span> rodrigue2@</text:p>
      <text:p text:style-name="P19">Router(config)#<text:span text:style-name="T27">username</text:span> rodrigue3 <text:span text:style-name="T27">privilege 15 secret</text:span> rodrigue3@</text:p>
      <text:p text:style-name="P19">Router(config)#<text:span text:style-name="T27">enable secret </text:span>admin1234</text:p>
      <text:p text:style-name="P19">Router(config)#<text:span text:style-name="T27">line vty 0 2</text:span></text:p>
      <text:p text:style-name="P19">Router(config-line)#<text:span text:style-name="T27">password</text:span> p@ssword1234</text:p>
      <text:p text:style-name="P19">Router(config-line)#<text:span text:style-name="T27">login local</text:span></text:p>
      <text:p text:style-name="P19">Router(config-line)#<text:span text:style-name="T27">transport input telnet</text:span></text:p>
      <text:p text:style-name="P19">Router(config-line)#<text:span text:style-name="T27">end</text:span></text:p>
      <text:p text:style-name="P19">Router#<text:span text:style-name="T27">write memory</text:span></text:p>
      <text:p text:style-name="P19"/>
      <text:p text:style-name="P19"/>
      <text:p text:style-name="P8">II- Acceder aux equipements a distance.</text:p>
      <text:p text:style-name="P8"/>
      <text:p text:style-name="P22">Important : <text:span text:style-name="T19">effectuer la configuration des adresses ip sur les Pcs</text:span></text:p>
      <text:p text:style-name="P22"><draw:frame draw:style-name="fr3" draw:name="Image5" text:anchor-type="char" svg:width="17cm" svg:height="9.183cm" draw:z-index="4"><draw:image xlink:href="Pictures/1000000100000311000001E2A8483A16.png" xlink:type="simple" xlink:show="embed" xlink:actuate="onLoad" draw:mime-type="image/png"/></draw:frame><text:soft-page-break/><text:span text:style-name="T19"/></text:p>
      <text:p text:style-name="P24"><text:tab/><text:span text:style-name="T36">1. <text:s/>Connection au switch</text:span></text:p>
      <text:p text:style-name="P24"/>
      <text:list text:style-name="L6">
        <text:list-item>
          <text:p text:style-name="P41">Sur PC<text:span text:style-name="T31">0 dans commande prompt</text:span></text:p>
          <text:p text:style-name="P41"/>
        </text:list-item>
      </text:list>
      <text:p text:style-name="P25"><text:tab/>C:\&gt;<text:span text:style-name="T27">telnet 192.168.1.6</text:span></text:p>
      <text:p text:style-name="P19"><text:tab/>Trying 192.168.1.6 ...Open</text:p>
      <text:p text:style-name="P19"/>
      <text:p text:style-name="P19"><text:tab/>User Access Verification</text:p>
      <text:p text:style-name="P19"/>
      <text:p text:style-name="P19"><text:tab/>Username: <text:span text:style-name="T27">rodrigue1</text:span></text:p>
      <text:p text:style-name="P27"><text:tab/>Password: <text:span text:style-name="T27">rodrigue1</text:span><text:span text:style-name="T28">@</text:span></text:p>
      <text:p text:style-name="P19"><text:tab/>Switch#</text:p>
      <text:p text:style-name="P28"><text:span text:style-name="T32">note :</text:span> <text:s/><text:span text:style-name="T35">le mot de passe de s’affiche pas au moment ou nous l’ecrivons.</text:span></text:p>
      <text:p text:style-name="P29">Switch# <text:span text:style-name="T35">montre que nous somme connecter au swith. Nous pouvons par exemple créer des VLANs sur <text:s/>a partir de PC0.</text:span></text:p>
      <text:p text:style-name="P15">192.168.1.6 est l’adresse ip du switch.</text:p>
      <text:p text:style-name="P15"/>
      <text:p text:style-name="P29"/>
      <text:p text:style-name="P29"/>
      <text:p text:style-name="P29"><text:soft-page-break/></text:p>
      <text:p text:style-name="P29"/>
      <text:p text:style-name="P29"/>
      <text:p text:style-name="P29"/>
      <text:p text:style-name="P29"/>
      <text:p text:style-name="P29"/>
      <text:p text:style-name="P29"><draw:frame draw:style-name="fr1" draw:name="Image6" text:anchor-type="char" svg:x="0cm" svg:y="-0.228cm" svg:width="17cm" svg:height="7.606cm" draw:z-index="5"><draw:image xlink:href="Pictures/1000000100000305000001E3B9A678F7.png" xlink:type="simple" xlink:show="embed" xlink:actuate="onLoad" draw:mime-type="image/png"/></draw:frame></text:p>
      <text:p text:style-name="P25"/>
      <text:p text:style-name="P24"/>
      <text:p text:style-name="P24"/>
      <text:list text:style-name="L7">
        <text:list-item>
          <text:p text:style-name="P36"><text:span text:style-name="T10">S</text:span><text:span text:style-name="T9">ur PC1</text:span></text:p>
        </text:list-item>
      </text:list>
      <text:p text:style-name="P14"><text:span text:style-name="T9"/></text:p>
      <text:p text:style-name="P14"><draw:frame draw:style-name="fr2" draw:name="Image7" text:anchor-type="char" svg:width="17cm" svg:height="5.987cm" draw:z-index="6"><draw:image xlink:href="Pictures/100000010000031B00000118D12ADD3A.png" xlink:type="simple" xlink:show="embed" xlink:actuate="onLoad" draw:mime-type="image/png"/></draw:frame><text:span text:style-name="T9"/></text:p>
      <text:list text:continue-numbering="true" text:style-name="L7">
        <text:list-item>
          <text:p text:style-name="P36"><text:span text:style-name="T10">S</text:span><text:span text:style-name="T9">ur PC2</text:span></text:p>
        </text:list-item>
      </text:list>
      <text:p text:style-name="P14"><draw:frame draw:style-name="fr2" draw:name="Image8" text:anchor-type="char" svg:width="17cm" svg:height="5.987cm" draw:z-index="7"><draw:image xlink:href="Pictures/100000010000031B00000118DB296C32.png" xlink:type="simple" xlink:show="embed" xlink:actuate="onLoad" draw:mime-type="image/png"/></draw:frame><text:soft-page-break/><text:span text:style-name="T9"/></text:p>
      <text:p text:style-name="P16"><text:span text:style-name="T25">n</text:span>ote : <text:span text:style-name="T1">la connection au switch a partir de PC2 echoue car seul deux peripherique peuvent acceder en simultannee au switch. Il faut donc que PC0 ou PC2 se deconnecte.</text:span></text:p>
      <text:p text:style-name="P17"><text:span text:style-name="T1">La commande </text:span><text:span text:style-name="T15">exit</text:span><text:span text:style-name="T1"> permet de deconncter du switch.</text:span></text:p>
      <text:p text:style-name="P5"><text:span text:style-name="T2"/></text:p>
      <text:p text:style-name="P26"><text:span text:style-name="T23">2</text:span><text:span text:style-name="T22">. <text:s/>Connection au </text:span><text:span text:style-name="T23">Routeur</text:span></text:p>
      <text:p text:style-name="P26"><text:span text:style-name="T23"/></text:p>
      <text:list text:style-name="L8">
        <text:list-item>
          <text:p text:style-name="P42"><text:span text:style-name="T21">Sur PC</text:span><text:span text:style-name="T24">1</text:span></text:p>
        </text:list-item>
      </text:list>
      <text:p text:style-name="P5"><draw:frame draw:style-name="fr1" draw:name="Image9" text:anchor-type="char" svg:x="0cm" svg:y="0.572cm" svg:width="17cm" svg:height="8.932cm" draw:z-index="8"><draw:image xlink:href="Pictures/10000001000003120000019D5E91693B.png" xlink:type="simple" xlink:show="embed" xlink:actuate="onLoad" draw:mime-type="image/png"/></draw:frame><text:span text:style-name="T2"/></text:p>
      <text:p text:style-name="P2"><text:span text:style-name="T34">n</text:span><text:span text:style-name="T33">ote : </text:span><text:span text:style-name="T14">Router# montre que nous somme connecter au Routeur. Nous pouvons par exemple configurer le protole RIP ce routeur.</text:span></text:p>
      <text:p text:style-name="P6"><text:span text:style-name="T2">S</text:span><text:span text:style-name="T1">eulement trois Pcs peuvent se connecter en simultanee au routeur.</text:span></text:p>
      <text:p text:style-name="P6"><text:span text:style-name="T1"/></text:p>
      <text:p text:style-name="P6"><text:soft-page-break/><text:span text:style-name="T1"/></text:p>
      <text:p text:style-name="P35">Conclusion</text:p>
      <text:p text:style-name="P34">En somme, le protocole Telnet constitue une solution simple et pédagogique pour comprendre les bases de l’administration à distance des équipements réseaux. Grâce à Cisco Packet Tracer, il devient possible de simuler son utilisation et d’acquérir une première expérience pratique. </text:p>
      <text:p text:style-name="P6"><text:span text:style-name="T1"/></text:p>
      <text:p text:style-name="P6"><text:span text:style-name="T1">Cependant, Telnet présente des limites majeures, notamment en matière de sécurité, car les données échangées ne sont pas chiffrées. C’est pourquoi, dans les environnements professionnels actuels, il est largement remplacé par des alternatives plus sûres comme SSH (Secure Shell). Ainsi, l’étude de Telnet reste une étape formatrice, mais elle doit être complétée par la découverte de protocoles modernes afin de répondre aux exigences de fiabilité et de protection des réseaux d’aujourd’hui.</text:span></text:p>
      <text:p text:style-name="P5"><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1T13:45:04.257720356</meta:creation-date>
    <dc:date>2026-02-11T16:20:20.542304730</dc:date>
    <meta:editing-duration>PT20M57S</meta:editing-duration>
    <meta:editing-cycles>3</meta:editing-cycles>
    <meta:generator>LibreOffice/24.2.7.2$Linux_X86_64 LibreOffice_project/420$Build-2</meta:generator>
    <meta:document-statistic meta:table-count="0" meta:image-count="9" meta:object-count="0" meta:page-count="8" meta:paragraph-count="75" meta:word-count="563" meta:character-count="4170" meta:non-whitespace-character-count="3654"/>
  </office:meta>
</office:document-meta>
</file>