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c3f24" officeooo:paragraph-rsid="001c3f24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c3f24" officeooo:paragraph-rsid="001c3f24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1c3f24" officeooo:paragraph-rsid="001c3f24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bold" officeooo:rsid="001c3f24" officeooo:paragraph-rsid="001c3f2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3f24" officeooo:paragraph-rsid="001c3f24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bold" officeooo:rsid="001e3415" officeooo:paragraph-rsid="001e3415" style:font-size-asian="12pt" style:font-weight-asian="bold" style:font-size-complex="12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fo:font-weight="bold" officeooo:rsid="001e3415" officeooo:paragraph-rsid="001e341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e3415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 Path et Commande de depannage.</text:p>
      <text:p text:style-name="P2">Config Path :</text:p>
      <text:p text:style-name="P2"/>
      <text:list text:style-name="L1">
        <text:list-item>
          <text:p text:style-name="P3">ACL :</text:p>
          <text:list>
            <text:list-item>
              <text:p text:style-name="P4">access-list 1 permit 192.168.0.0 0.0.0.255</text:p>
            </text:list-item>
            <text:list-item>
              <text:p text:style-name="P4">ip nat inside source list 1 interface gig0/0 overload</text:p>
              <text:list>
                <text:list-item>
                  <text:list>
                    <text:list-item>
                      <text:p text:style-name="P4">ip nat inside source → <text:span text:style-name="T1">on utilise les adresses interne pour les traduitre.</text:span></text:p>
                    </text:list-item>
                    <text:list-item>
                      <text:p text:style-name="P4">list 1<text:tab/>→ <text:span text:style-name="T1">on utilise la liste 1 de l’ACL.</text:span></text:p>
                    </text:list-item>
                    <text:list-item>
                      <text:p text:style-name="P4">interface gig0/0 → <text:span text:style-name="T1">on utilise l’adresse ip public de l’interface vers le FAI.</text:span></text:p>
                    </text:list-item>
                    <text:list-item>
                      <text:p text:style-name="P4"><text:span text:style-name="T1">Overload → le mot qui permet de faire du PATH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>En résumé <text:span text:style-name="T1">: On prend les paquets qui viennent de l’Inside, on remplace leur adresse SOURCE par l’IP publique de sortie, et grâce à </text:span>overload<text:span text:style-name="T1">, plusieurs hôtes partagent cette même IP</text:span></text:p>
      <text:p text:style-name="P5"><text:span text:style-name="T1"/></text:p>
      <text:list text:style-name="L2">
        <text:list-item>
          <text:p text:style-name="P6">designer l’interface inside et l’interface outside</text:p>
          <text:p text:style-name="P6"/>
        </text:list-item>
      </text:list>
      <text:list text:style-name="L4">
        <text:list-item>
          <text:list>
            <text:list-item>
              <text:p text:style-name="P7"><text:span text:style-name="T4">int gig0/1</text:span></text:p>
            </text:list-item>
            <text:list-item>
              <text:p text:style-name="P7"><text:span text:style-name="T4">ip nat inside</text:span></text:p>
            </text:list-item>
            <text:list-item>
              <text:p text:style-name="P7"><text:span text:style-name="T4">int gig0/0</text:span></text:p>
            </text:list-item>
            <text:list-item>
              <text:p text:style-name="P7"><text:span text:style-name="T4">ip nat outside</text:span></text:p>
              <text:p text:style-name="P7"><text:span text:style-name="T4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09:01:39.122062698</meta:creation-date>
    <meta:generator>LibreOffice/24.2.7.2$Linux_X86_64 LibreOffice_project/420$Build-2</meta:generator>
    <dc:date>2026-05-01T10:17:47.800425347</dc:date>
    <meta:editing-duration>PT36M11S</meta:editing-duration>
    <meta:editing-cycles>2</meta:editing-cycles>
    <meta:document-statistic meta:table-count="0" meta:image-count="0" meta:object-count="0" meta:page-count="1" meta:paragraph-count="17" meta:word-count="132" meta:character-count="678" meta:non-whitespace-character-count="575"/>
  </office:meta>
</office:document-meta>
</file>