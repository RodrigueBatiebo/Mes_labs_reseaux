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875cm" table:align="left"/>
    </style:style>
    <style:style style:name="Table1.A" style:family="table-column">
      <style:table-column-properties style:column-width="5.198cm"/>
    </style:style>
    <style:style style:name="Table1.B" style:family="table-column">
      <style:table-column-properties style:column-width="1.826cm"/>
    </style:style>
    <style:style style:name="Table1.C" style:family="table-column">
      <style:table-column-properties style:column-width="4.255cm"/>
    </style:style>
    <style:style style:name="Table1.D" style:family="table-column">
      <style:table-column-properties style:column-width="4.59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898cm"/>
    </style:style>
    <style:style style:name="Table2.B" style:family="table-column">
      <style:table-column-properties style:column-width="7.595cm"/>
    </style:style>
    <style:style style:name="Table2.C" style:family="table-column">
      <style:table-column-properties style:column-width="7.50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6.605cm" table:align="left"/>
    </style:style>
    <style:style style:name="Table3.A" style:family="table-column">
      <style:table-column-properties style:column-width="6.107cm"/>
    </style:style>
    <style:style style:name="Table3.B" style:family="table-column">
      <style:table-column-properties style:column-width="4.692cm"/>
    </style:style>
    <style:style style:name="Table3.C" style:family="table-column">
      <style:table-column-properties style:column-width="5.807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text-align="start" style:justify-single-word="false"/>
      <style:text-properties fo:color="#0000ff" loext:opacity="100%" fo:font-size="12pt" fo:font-weight="bold" officeooo:rsid="0012ac68" officeooo:paragraph-rsid="0012ac68" style:font-size-asian="10.5pt" style:font-weight-asian="bold" style:font-size-complex="12pt" style:font-weight-complex="bold"/>
    </style:style>
    <style:style style:name="P2" style:family="paragraph" style:parent-style-name="Heading_20_3">
      <style:paragraph-properties fo:text-align="start" style:justify-single-word="false"/>
      <style:text-properties fo:color="#000000" loext:opacity="100%" fo:font-size="12pt" fo:font-weight="bold" officeooo:rsid="00150e53" officeooo:paragraph-rsid="00150e5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50e53" officeooo:paragraph-rsid="00150e5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4c7a9" officeooo:paragraph-rsid="0014c7a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78ac8" officeooo:paragraph-rsid="00178ac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a1a33" officeooo:paragraph-rsid="001a1a3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a9a47" officeooo:paragraph-rsid="001a9a4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a9a47" officeooo:paragraph-rsid="001bd2e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bd2e1" officeooo:paragraph-rsid="001bd2e1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e6a50" officeooo:paragraph-rsid="001e6a50" style:font-size-asian="10.5pt" style:font-weight-asian="bold" style:font-size-complex="12pt" style:font-weight-complex="bold"/>
    </style:style>
    <style:style style:name="P11" style:family="paragraph" style:parent-style-name="Preformatted_20_Text">
      <style:paragraph-properties fo:margin-top="0cm" fo:margin-bottom="0.499cm" style:contextual-spacing="false"/>
    </style:style>
    <style:style style:name="P12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12ac68" officeooo:paragraph-rsid="0012ac68" style:font-size-asian="16pt" style:font-weight-asian="bold" style:font-size-complex="16pt" style:font-weight-complex="bold"/>
    </style:style>
    <style:style style:name="P13" style:family="paragraph" style:parent-style-name="Table_20_Heading">
      <style:paragraph-properties fo:margin-left="0cm" fo:margin-right="0cm" fo:text-indent="0cm" style:auto-text-indent="false"/>
    </style:style>
    <style:style style:name="P14" style:family="paragraph" style:parent-style-name="Heading_20_3">
      <style:paragraph-properties fo:text-align="start" style:justify-single-word="false"/>
      <style:text-properties fo:color="#0000ff" loext:opacity="100%" fo:font-size="12pt" fo:font-weight="bold" officeooo:rsid="001e6a50" officeooo:paragraph-rsid="001e6a50" style:font-size-asian="10.5pt" style:font-weight-asian="bold" style:font-size-complex="12pt" style:font-weight-complex="bold"/>
    </style:style>
    <style:style style:name="P15" style:family="paragraph" style:parent-style-name="Heading_20_3">
      <style:paragraph-properties fo:text-align="start" style:justify-single-word="false"/>
      <style:text-properties fo:color="#0000ff" loext:opacity="100%" fo:font-size="12pt" fo:font-weight="bold" officeooo:rsid="00150e53" officeooo:paragraph-rsid="002242f1" style:font-size-asian="10.5pt" style:font-weight-asian="bold" style:font-size-complex="12pt" style:font-weight-complex="bold"/>
    </style:style>
    <style:style style:name="P16" style:family="paragraph" style:parent-style-name="Heading_20_3">
      <style:paragraph-properties fo:text-align="start" style:justify-single-word="false"/>
      <style:text-properties fo:color="#0000ff" loext:opacity="100%" fo:font-size="12pt" fo:font-weight="bold" officeooo:rsid="0012ac68" officeooo:paragraph-rsid="00272b95" style:font-size-asian="10.5pt" style:font-weight-asian="bold" style:font-size-complex="12pt" style:font-weight-complex="bold"/>
    </style:style>
    <style:style style:name="P17" style:family="paragraph" style:parent-style-name="Heading_20_3">
      <style:paragraph-properties fo:text-align="start" style:justify-single-word="false"/>
      <style:text-properties fo:color="#0000ff" loext:opacity="100%" fo:font-size="12pt" fo:font-weight="normal" officeooo:rsid="00150e53" officeooo:paragraph-rsid="00150e53" style:font-size-asian="10.5pt" style:font-weight-asian="normal" style:font-size-complex="12pt" style:font-weight-complex="normal"/>
    </style:style>
    <style:style style:name="P18" style:family="paragraph" style:parent-style-name="Heading_20_3">
      <style:paragraph-properties fo:text-align="start" style:justify-single-word="false"/>
      <style:text-properties fo:color="#000000" loext:opacity="100%" fo:font-size="12pt" fo:font-weight="normal" officeooo:rsid="00272b95" officeooo:paragraph-rsid="00272b95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color="#0000ff" loext:opacity="100%" fo:font-size="12pt" fo:font-weight="bold" officeooo:rsid="002242f1" officeooo:paragraph-rsid="002242f1" style:font-size-asian="10.5pt" style:font-weight-asian="bold" style:font-size-complex="12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color="#0000ff" loext:opacity="100%" fo:font-size="12pt" fo:font-weight="bold" officeooo:rsid="00253edf" officeooo:paragraph-rsid="00253edf" style:font-size-asian="10.5pt" style:font-weight-asian="bold" style:font-size-complex="12pt" style:font-weight-complex="bold"/>
    </style:style>
    <style:style style:name="P21" style:family="paragraph" style:parent-style-name="Text_20_body">
      <style:paragraph-properties fo:text-align="start" style:justify-single-word="false"/>
      <style:text-properties fo:color="#000000" loext:opacity="100%" fo:font-size="12pt" fo:font-weight="normal" officeooo:rsid="00272b95" officeooo:paragraph-rsid="00272b95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e116" style:font-weight-asian="normal" style:font-weight-complex="normal"/>
    </style:style>
    <style:style style:name="T3" style:family="text">
      <style:text-properties fo:font-weight="normal" officeooo:rsid="001a9a47" style:font-weight-asian="normal" style:font-weight-complex="normal"/>
    </style:style>
    <style:style style:name="T4" style:family="text">
      <style:text-properties fo:font-weight="normal" officeooo:rsid="001d4d23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e116"/>
    </style:style>
    <style:style style:name="T7" style:family="text">
      <style:text-properties officeooo:rsid="00178ac8"/>
    </style:style>
    <style:style style:name="T8" style:family="text">
      <style:text-properties officeooo:rsid="001aa7f6"/>
    </style:style>
    <style:style style:name="T9" style:family="text">
      <style:text-properties officeooo:rsid="001bd2e1"/>
    </style:style>
    <style:style style:name="T10" style:family="text">
      <style:text-properties officeooo:rsid="002242f1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officeooo:rsid="002242f1"/>
    </style:style>
    <style:style style:name="T13" style:family="text">
      <style:text-properties fo:color="#000000" loext:opacity="100%" officeooo:rsid="00240666"/>
    </style:style>
    <style:style style:name="T14" style:family="text">
      <style:text-properties fo:color="#000000" loext:opacity="100%" fo:font-weight="normal" style:font-weight-asian="normal" style:font-weight-complex="normal"/>
    </style:style>
    <style:style style:name="T15" style:family="text">
      <style:text-properties fo:color="#000000" loext:opacity="100%" fo:font-weight="normal" officeooo:rsid="00240666" style:font-weight-asian="normal" style:font-weight-complex="normal"/>
    </style:style>
    <style:style style:name="T16" style:family="text">
      <style:text-properties fo:color="#000000" loext:opacity="100%" fo:font-weight="normal" officeooo:rsid="00272b95" style:font-weight-asian="normal" style:font-weight-complex="normal"/>
    </style:style>
    <style:style style:name="T17" style:family="text">
      <style:text-properties fo:color="#000000" loext:opacity="100%" officeooo:rsid="00272b95"/>
    </style:style>
    <style:style style:name="T18" style:family="text">
      <style:text-properties officeooo:rsid="00150e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onfiguration d’une liste d’acces </text:p>
      <text:h text:style-name="P1" text:outline-level="3">Qu'est-ce qu'une ACL ?</text:h>
      <text:p text:style-name="Text_20_body">Une <text:span text:style-name="Strong_20_Emphasis">Access Control List (ACL)</text:span> est un ensemble de règles appliquées sur un routeur pour <text:span text:style-name="Strong_20_Emphasis">filtrer le trafic réseau</text:span>. Le routeur examine chaque paquet et décide de le laisser passer (PERMIT) ou de le bloquer (DENY).</text:p>
      <text:p text:style-name="Text_20_body">Les règles sont lues <text:span text:style-name="Strong_20_Emphasis">séquentiellement</text:span>, de haut en bas. Dès qu'une règle correspond, elle s'applique et les suivantes sont ignorées.</text:p>
      <text:h text:style-name="P1" text:outline-level="3">Deux types d'ACL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Type</text:p>
          </table:table-cell>
          <table:table-cell table:style-name="Table1.A1" office:value-type="string">
            <text:p text:style-name="Table_20_Heading">Numéros</text:p>
          </table:table-cell>
          <table:table-cell table:style-name="Table1.A1" office:value-type="string">
            <text:p text:style-name="Table_20_Heading">Filtre sur</text:p>
          </table:table-cell>
          <table:table-cell table:style-name="Table1.A1" office:value-type="string">
            <text:p text:style-name="Table_20_Heading">Placement recommandé</text:p>
          </table:table-cell>
        </table:table-row>
        <table:table-row>
          <table:table-cell table:style-name="Table1.A1" office:value-type="string">
            <text:p text:style-name="Table_20_Contents">Standard1–99, 1300–1999</text:p>
          </table:table-cell>
          <table:table-cell table:style-name="Table1.A1" office:value-type="string">
            <text:p text:style-name="Table_20_Contents">1–99</text:p>
          </table:table-cell>
          <table:table-cell table:style-name="Table1.A1" office:value-type="string">
            <text:p text:style-name="Table_20_Contents">IP source uniquement</text:p>
          </table:table-cell>
          <table:table-cell table:style-name="Table1.A1" office:value-type="string">
            <text:p text:style-name="Table_20_Contents">Proche de la destination</text:p>
          </table:table-cell>
        </table:table-row>
        <table:table-row>
          <table:table-cell table:style-name="Table1.A1" office:value-type="string">
            <text:p text:style-name="Table_20_Contents">Étendue100–199, 2000–2699</text:p>
          </table:table-cell>
          <table:table-cell table:style-name="Table1.A1" office:value-type="string">
            <text:p text:style-name="Table_20_Contents">100–199</text:p>
          </table:table-cell>
          <table:table-cell table:style-name="Table1.A1" office:value-type="string">
            <text:p text:style-name="Table_20_Contents">Src, Dst, protocole, port</text:p>
          </table:table-cell>
          <table:table-cell table:style-name="Table1.A1" office:value-type="string">
            <text:p text:style-name="Table_20_Contents">Proche de la source</text:p>
          </table:table-cell>
        </table:table-row>
      </table:table>
      <text:h text:style-name="P1" text:outline-level="3">ACL Standard — principe</text:h>
      <text:p text:style-name="Text_20_body">Une ACL standard filtre uniquement en fonction de l'<text:span text:style-name="Strong_20_Emphasis">adresse IP source</text:span>. Elle ne tient pas compte de la destination, du protocole ou des ports.</text:p>
      <text:h text:style-name="Heading_20_4" text:outline-level="4">Syntaxe générale</text:h>
      <text:p text:style-name="P11">access-list [1-99] permit|deny [source] [wildcard]</text:p>
      <text:p text:style-name="P4">exemple : </text:p>
      <text:p text:style-name="P4"/>
      <text:p text:style-name="P4">access-list 10 permit host 192.168.1.20 <text:span text:style-name="T1">pour autoriser un hote </text:span></text:p>
      <text:p text:style-name="P4">access-list 10 deny host 192.168.1.10<text:span text:style-name="T1"> pour refuser un hote</text:span></text:p>
      <text:p text:style-name="P10">access-list 10 permit any <text:span text:style-name="T1">pour permettre les autres communications.</text:span></text:p>
      <text:p text:style-name="P10"/>
      <text:p text:style-name="P4">access-list 10 permit 192.168.1.0 0.0.0.255 <text:span text:style-name="T1">pour autoriser tout un reseau</text:span></text:p>
      <text:p text:style-name="P4">access-list 10 permit 192.168.2..0 0.0.0.255<text:span text:style-name="T1"> pour refuser un reseau.</text:span></text:p>
      <text:p text:style-name="P10">access-list 10 permit any<text:span text:style-name="T1"> pour permettre les autres communications.</text:span></text:p>
      <text:p text:style-name="P4"><text:span text:style-name="T1"/></text:p>
      <text:p text:style-name="P3">int ….</text:p>
      <text:p text:style-name="P3"><text:span text:style-name="T7">ip </text:span>access-group 1 out <text:s/><text:span text:style-name="T2">pour appliquer l’acl sur l’interface proche de la destination</text:span></text:p>
      <text:p text:style-name="P3"><text:span text:style-name="T2"/></text:p>
      <text:p text:style-name="P5"><text:span text:style-name="T6">l</text:span>ine vty 0 4</text:p>
      <text:p text:style-name="P5">ip access-class 10 in <text:span text:style-name="T1">pour appliquer l’acl sur une ligne virtuel</text:span></text:p>
      <text:p text:style-name="P5"><text:span text:style-name="T1"/></text:p>
      <text:h text:style-name="P2" text:outline-level="3">Quand choisir IN ou OUT ?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Direction</text:p>
          </table:table-cell>
          <table:table-cell table:style-name="Table2.A1" office:value-type="string">
            <text:p text:style-name="P13">Ce qui se passe</text:p>
          </table:table-cell>
          <table:table-cell table:style-name="Table2.A1" office:value-type="string">
            <text:p text:style-name="Table_20_Heading">Quand l'utiliser</text:p>
          </table:table-cell>
        </table:table-row>
        <table:table-row>
          <table:table-cell table:style-name="Table2.A1" office:value-type="string">
            <text:p text:style-name="Table_20_Contents">IN</text:p>
          </table:table-cell>
          <table:table-cell table:style-name="Table2.A1" office:value-type="string">
            <text:p text:style-name="Table_20_Contents">Le paquet est filtré <text:span text:style-name="Strong_20_Emphasis">avant</text:span> que le routeur ne le traite ou ne le route. S'il est bloqué, il est jeté immédiatement.</text:p>
          </table:table-cell>
          <table:table-cell table:style-name="Table2.A1" office:value-type="string">
            <text:p text:style-name="Table_20_Contents">ACL étendue proche de la source. Le paquet ne consomme pas de ressources de routage inutilement.</text:p>
          </table:table-cell>
        </table:table-row>
        <table:table-row>
          <table:table-cell table:style-name="Table2.A1" office:value-type="string">
            <text:p text:style-name="Table_20_Contents">OUT</text:p>
          </table:table-cell>
          <table:table-cell table:style-name="Table2.A1" office:value-type="string">
            <text:p text:style-name="Table_20_Contents">Le paquet est d'abord routé normalement, puis filtré <text:span text:style-name="Strong_20_Emphasis">juste avant</text:span> de sortir par l'interface de destination.</text:p>
          </table:table-cell>
          <table:table-cell table:style-name="Table2.A1" office:value-type="string">
            <text:p text:style-name="Table_20_Contents">ACL standard proche de la destination. Pratique quand plusieurs sources différentes arrivent sur un même routeur.</text:p>
          </table:table-cell>
        </table:table-row>
      </table:table>
      <text:h text:style-name="P16" text:outline-level="3">ACL Standard <text:span text:style-name="T18">Nommée</text:span></text:h>
      <text:p text:style-name="P21">Ip access-list standard pcA_to_server</text:p>
      <text:p text:style-name="P21"><text:soft-page-break/>deny host 192.168.1.2 </text:p>
      <text:p text:style-name="P21">permit any</text:p>
      <text:h text:style-name="P18" text:outline-level="3">interface gig0/1</text:h>
      <text:p text:style-name="P21">Ip access-group pcA_to_server out</text:p>
      <text:h text:style-name="P17" text:outline-level="3">ACL Étendue — principe</text:h>
      <text:p text:style-name="Text_20_body">Une ACL étendue offre un contrôle très précis. Elle peut filtrer sur : l'IP source, l'IP destination, le protocole (TCP, UDP, ICMP…) et les numéros de port.</text:p>
      <text:h text:style-name="Heading_20_4" text:outline-level="4">Syntaxe générale</text:h>
      <text:p text:style-name="Preformatted_20_Text">access-list [100-199] permit|deny [protocole]</text:p>
      <text:p text:style-name="Preformatted_20_Text"><text:s text:c="2"/>[src] [wildcard-src]</text:p>
      <text:p text:style-name="Preformatted_20_Text"><text:s text:c="2"/>[dst] [wildcard-dst]</text:p>
      <text:p text:style-name="P11"><text:s text:c="2"/>[eq port]</text:p>
      <text:h text:style-name="P2" text:outline-level="3">Ports courants à connaître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Service</text:p>
          </table:table-cell>
          <table:table-cell table:style-name="Table3.A1" office:value-type="string">
            <text:p text:style-name="Table_20_Heading">Protocole</text:p>
          </table:table-cell>
          <table:table-cell table:style-name="Table3.A1" office:value-type="string">
            <text:p text:style-name="Table_20_Heading">Port</text:p>
          </table:table-cell>
        </table:table-row>
        <table:table-row>
          <table:table-cell table:style-name="Table3.A1" office:value-type="string">
            <text:p text:style-name="Table_20_Contents">HTTP</text:p>
          </table:table-cell>
          <table:table-cell table:style-name="Table3.A1" office:value-type="string">
            <text:p text:style-name="Table_20_Contents">TCP</text:p>
          </table:table-cell>
          <table:table-cell table:style-name="Table3.A1" office:value-type="string">
            <text:p text:style-name="Table_20_Contents">80</text:p>
          </table:table-cell>
        </table:table-row>
        <table:table-row>
          <table:table-cell table:style-name="Table3.A1" office:value-type="string">
            <text:p text:style-name="Table_20_Contents">HTTPS</text:p>
          </table:table-cell>
          <table:table-cell table:style-name="Table3.A1" office:value-type="string">
            <text:p text:style-name="Table_20_Contents">TCP</text:p>
          </table:table-cell>
          <table:table-cell table:style-name="Table3.A1" office:value-type="string">
            <text:p text:style-name="Table_20_Contents">443</text:p>
          </table:table-cell>
        </table:table-row>
        <table:table-row>
          <table:table-cell table:style-name="Table3.A1" office:value-type="string">
            <text:p text:style-name="Table_20_Contents">FTP données</text:p>
          </table:table-cell>
          <table:table-cell table:style-name="Table3.A1" office:value-type="string">
            <text:p text:style-name="Table_20_Contents">TCP</text:p>
          </table:table-cell>
          <table:table-cell table:style-name="Table3.A1" office:value-type="string">
            <text:p text:style-name="Table_20_Contents">20</text:p>
          </table:table-cell>
        </table:table-row>
        <table:table-row>
          <table:table-cell table:style-name="Table3.A1" office:value-type="string">
            <text:p text:style-name="Table_20_Contents">FTP contrôle</text:p>
          </table:table-cell>
          <table:table-cell table:style-name="Table3.A1" office:value-type="string">
            <text:p text:style-name="Table_20_Contents">TCP</text:p>
          </table:table-cell>
          <table:table-cell table:style-name="Table3.A1" office:value-type="string">
            <text:p text:style-name="Table_20_Contents">21</text:p>
          </table:table-cell>
        </table:table-row>
        <table:table-row>
          <table:table-cell table:style-name="Table3.A1" office:value-type="string">
            <text:p text:style-name="Table_20_Contents">SSH</text:p>
          </table:table-cell>
          <table:table-cell table:style-name="Table3.A1" office:value-type="string">
            <text:p text:style-name="Table_20_Contents">TCP</text:p>
          </table:table-cell>
          <table:table-cell table:style-name="Table3.A1" office:value-type="string">
            <text:p text:style-name="Table_20_Contents">22</text:p>
          </table:table-cell>
        </table:table-row>
        <table:table-row>
          <table:table-cell table:style-name="Table3.A1" office:value-type="string">
            <text:p text:style-name="Table_20_Contents">Telnet</text:p>
          </table:table-cell>
          <table:table-cell table:style-name="Table3.A1" office:value-type="string">
            <text:p text:style-name="Table_20_Contents">TCP</text:p>
          </table:table-cell>
          <table:table-cell table:style-name="Table3.A1" office:value-type="string">
            <text:p text:style-name="Table_20_Contents">23</text:p>
          </table:table-cell>
        </table:table-row>
        <table:table-row>
          <table:table-cell table:style-name="Table3.A1" office:value-type="string">
            <text:p text:style-name="Table_20_Contents">DNS</text:p>
          </table:table-cell>
          <table:table-cell table:style-name="Table3.A1" office:value-type="string">
            <text:p text:style-name="Table_20_Contents">UDP/TCP</text:p>
          </table:table-cell>
          <table:table-cell table:style-name="Table3.A1" office:value-type="string">
            <text:p text:style-name="Table_20_Contents">53</text:p>
          </table:table-cell>
        </table:table-row>
        <table:table-row>
          <table:table-cell table:style-name="Table3.A1" office:value-type="string">
            <text:p text:style-name="Table_20_Contents">DHCP</text:p>
          </table:table-cell>
          <table:table-cell table:style-name="Table3.A1" office:value-type="string">
            <text:p text:style-name="Table_20_Contents">UDP</text:p>
          </table:table-cell>
          <table:table-cell table:style-name="Table3.A1" office:value-type="string">
            <text:p text:style-name="Table_20_Contents">67/68</text:p>
          </table:table-cell>
        </table:table-row>
        <table:table-row>
          <table:table-cell table:style-name="Table3.A1" office:value-type="string">
            <text:p text:style-name="Table_20_Contents">SNMP</text:p>
          </table:table-cell>
          <table:table-cell table:style-name="Table3.A1" office:value-type="string">
            <text:p text:style-name="Table_20_Contents">UDP</text:p>
          </table:table-cell>
          <table:table-cell table:style-name="Table3.A1" office:value-type="string">
            <text:p text:style-name="Table_20_Contents">161</text:p>
          </table:table-cell>
        </table:table-row>
      </table:table>
      <text:p text:style-name="P3"/>
      <text:p text:style-name="P6">Exemple : </text:p>
      <text:p text:style-name="P6"/>
      <text:p text:style-name="P6">access-list 100 permit icmp host 192.168.1.10 host 10.0.0.2 <text:span text:style-name="T3">pour autoriser un hot a pinguer le server FTP</text:span></text:p>
      <text:p text:style-name="P6"><text:span text:style-name="T3"/></text:p>
      <text:p text:style-name="P7">access-list 100 deny any 192.168.1.0 0.0.0.255 <text:span text:style-name="T8">10.0.0.0 0.0.0.</text:span><text:span text:style-name="T9">3</text:span></text:p>
      <text:p text:style-name="P8"><text:span text:style-name="T9">access-list 100 deny any </text:span><text:span text:style-name="T8">10.0.0.0 0.0.0.</text:span><text:span text:style-name="T9">3 192.168.1.0 0.0.0.255</text:span></text:p>
      <text:p text:style-name="P9">access-list 100 permit any any <text:span text:style-name="T4">pour bloquer la communication entre ces deux reseaux et permettre <text:s/>la communication avec les autres reseaux.</text:span></text:p>
      <text:p text:style-name="P9"><text:span text:style-name="T4"/></text:p>
      <text:h text:style-name="P15" text:outline-level="3">ACL Étendue Nommée</text:h>
      <text:p text:style-name="Text_20_body">Les ACL nommées sont plus lisibles et permettent de supprimer des règles individuelles.</text:p>
      <text:p text:style-name="Preformatted_20_Text"><text:span text:style-name="T5">R1(config)#</text:span> ip access-list extended FILTRE-WEB</text:p>
      <text:p text:style-name="Preformatted_20_Text"><text:span text:style-name="T5">R1(config-ext-nacl)#</text:span> permit tcp 192.168.1.0 0.0.0.255 any eq 80</text:p>
      <text:p text:style-name="Preformatted_20_Text"><text:span text:style-name="T5">R1(config-ext-nacl)#</text:span> permit tcp 192.168.1.0 0.0.0.255 any eq 443</text:p>
      <text:p text:style-name="Preformatted_20_Text"><text:span text:style-name="T5">R1(config-ext-nacl)#</text:span> deny ip any any</text:p>
      <text:p text:style-name="Preformatted_20_Text"><text:span text:style-name="T5">R1(config)#</text:span> interface GigabitEthernet0/0</text:p>
      <text:p text:style-name="P11"><text:span text:style-name="T5">R1(config-if)#</text:span> ip access-group FILTRE-WEB in</text:p>
      <text:h text:style-name="P14" text:outline-level="3"><text:soft-page-break/><text:s/><text:span text:style-name="T10">Exemple de politique: </text:span><text:span text:style-name="T12">autoriser seulement la communicationentre le VLAN 20 et le server.</text:span></text:h>
      <text:p text:style-name="P19"><text:span text:style-name="T11">Ip access-list extended vlan10_to_server</text:span></text:p>
      <text:p text:style-name="P19"><text:span text:style-name="T11">permit icmp 192.168.2.0 0.0.0.255 host 10.0.0.2</text:span></text:p>
      <text:p text:style-name="P19"><text:span text:style-name="T11">deny ip any </text:span><text:span text:style-name="T13">host 10.0.0.2 </text:span><text:span text:style-name="T15">pour refuser la communication , peu import le Internet Protocol (IP)</text:span></text:p>
      <text:p text:style-name="P19"><text:span text:style-name="T11">interface gig0/</text:span><text:span text:style-name="T17">1</text:span></text:p>
      <text:p text:style-name="P19"><text:span text:style-name="T11">ip access-group <text:s/>vlan10_to_server </text:span><text:span text:style-name="T17">out</text:span></text:p>
      <text:p text:style-name="P20">important :<text:span text:style-name="T11"> </text:span><text:span text:style-name="T14">dans ce cas notre ACL doit etre proche de la destination en out. Car </text:span><text:span text:style-name="T16">la communication de chaque VLAN passe par la sous interface qui lui sert de gatewa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4T09:33:11.898138952</meta:creation-date>
    <dc:date>2026-05-06T10:17:42.947980802</dc:date>
    <meta:editing-duration>PT33M16S</meta:editing-duration>
    <meta:editing-cycles>2</meta:editing-cycles>
    <meta:generator>LibreOffice/24.2.7.2$Linux_X86_64 LibreOffice_project/420$Build-2</meta:generator>
    <meta:document-statistic meta:table-count="3" meta:image-count="0" meta:object-count="0" meta:page-count="3" meta:paragraph-count="106" meta:word-count="584" meta:character-count="3751" meta:non-whitespace-character-count="3262"/>
  </office:meta>
</office:document-meta>
</file>